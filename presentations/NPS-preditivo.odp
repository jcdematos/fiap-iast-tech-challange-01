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20000001A38E6822737746204.png" manifest:media-type="image/png"/>
  <manifest:file-entry manifest:full-path="Pictures/100002010000006400000064438DAD87886A2C48.png" manifest:media-type="image/png"/>
  <manifest:file-entry manifest:full-path="Pictures/100002010000006400000064A6BF270228A4DCD7.png" manifest:media-type="image/png"/>
  <manifest:file-entry manifest:full-path="Pictures/1000020100000200000002001A1D1C771F58944B.png" manifest:media-type="image/png"/>
  <manifest:file-entry manifest:full-path="Pictures/1000020100000200000002000E9D8076B40E08B4.png" manifest:media-type="image/png"/>
  <manifest:file-entry manifest:full-path="Pictures/100002010000020000000200590C401C21F1886B.png" manifest:media-type="image/png"/>
  <manifest:file-entry manifest:full-path="Pictures/100002010000010000000100C79C447C51D61E6F.png" manifest:media-type="image/png"/>
  <manifest:file-entry manifest:full-path="Pictures/10000201000005E800000870F82ECE8A1810778B.png" manifest:media-type="image/png"/>
  <manifest:file-entry manifest:full-path="Pictures/1000020100000050000000502016C7B55DF35858.png" manifest:media-type="image/png"/>
  <manifest:file-entry manifest:full-path="Pictures/10000201000001000000010042760C11B9FE551D.png" manifest:media-type="image/png"/>
  <manifest:file-entry manifest:full-path="Pictures/10000201000009C4000006BAE061D6F4B55AFCDC.png" manifest:media-type="image/png"/>
  <manifest:file-entry manifest:full-path="Pictures/1000020100000399000000DC05E867C0C1E7EDD3.png" manifest:media-type="image/png"/>
  <manifest:file-entry manifest:full-path="Pictures/100002010000005000000050845466DFA09C18FA.png" manifest:media-type="image/png"/>
  <manifest:file-entry manifest:full-path="Pictures/100002010000004A0000003C8105D9AC4669731B.png" manifest:media-type="image/png"/>
  <manifest:file-entry manifest:full-path="Pictures/1000020100000306000001E4FEB2A67C84BECC3C.png" manifest:media-type="image/png"/>
  <manifest:file-entry manifest:full-path="Pictures/100002010000010000000100A419B51FD0D8244D.png" manifest:media-type="image/png"/>
  <manifest:file-entry manifest:full-path="Pictures/10000201000000B2000000B201C8B35C7E53E143.png" manifest:media-type="image/png"/>
  <manifest:file-entry manifest:full-path="Pictures/10000201000000B2000000B207A2FB3995EDF1A9.png" manifest:media-type="image/png"/>
  <manifest:file-entry manifest:full-path="Pictures/10000201000001000000010038C91A90C7F9CD54.png" manifest:media-type="image/png"/>
  <manifest:file-entry manifest:full-path="Pictures/100002010000010000000100136A1B5B0F07FE3D.png" manifest:media-type="image/png"/>
  <manifest:file-entry manifest:full-path="Pictures/100002010000020000000200CCE0A087542B6406.png" manifest:media-type="image/png"/>
  <manifest:file-entry manifest:full-path="Pictures/10000201000001000000010052608ABCE0645C73.png" manifest:media-type="image/png"/>
  <manifest:file-entry manifest:full-path="Pictures/10000201000003D8000001E4D2ADD412A0D68F7D.png" manifest:media-type="image/png"/>
  <manifest:file-entry manifest:full-path="Pictures/100002010000006400000064E4D8AF011C704690.png" manifest:media-type="image/png"/>
  <manifest:file-entry manifest:full-path="Pictures/100002010000006400000064CA2A9EF052F6A46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Host Grotesk" svg:font-family="'Host Grotesk'"/>
    <style:font-face style:name="Host Grotesk Medium" svg:font-family="'Host Grotesk Medium'"/>
    <style:font-face style:name="Roboto" svg:font-family="Roboto"/>
    <style:font-face style:name="Roboto Medium" svg:font-family="'Robot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5f5f0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draw:fill="solid" draw:fill-color="#f5f5f0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solid" draw:fill-color="#d9edf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solid" draw:fill-color="#faf9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bfd3d8" draw:stroke-linejoin="round" draw:fill="solid" draw:fill-color="#d9edf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ffffff" draw:opacity="51%" draw:textarea-vertical-align="middle" draw:auto-grow-height="false" draw:fit-to-size="false" style:shrink-to-fit="false" fo:min-height="0cm" fo:min-width="0cm" fo:padding-top="0.129cm" fo:padding-bottom="0.129cm" fo:padding-left="0.129cm" fo:padding-right="0.129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95ccda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b6d6f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bfd3d8" draw:stroke-linejoin="round" draw:fill="solid" draw:fill-color="#d9edf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4cm" svg:stroke-color="#bfd3d8" draw:stroke-linejoin="round" draw:fill="solid" draw:fill-color="#faf9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159cm" fo:padding-right="0cm" fo:wrap-option="wrap"/>
    </style:style>
    <style:style style:name="gr20" style:family="graphic" style:parent-style-name="standard">
      <style:graphic-properties draw:stroke="none" svg:stroke-width="0cm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solid" svg:stroke-width="0.035cm" svg:stroke-color="#3a6a85" draw:stroke-linejoin="round" draw:fill="solid" draw:fill-color="#3a6a8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32cm" svg:stroke-color="#3a8a80" draw:stroke-linejoin="round" draw:fill="solid" draw:fill-color="#3a8a8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32cm" svg:stroke-color="#2e7d5a" draw:stroke-linejoin="round" draw:fill="solid" draw:fill-color="#2e7d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026cm" svg:stroke-color="#b0c8d8" draw:stroke-linejoin="round" draw:fill="solid" draw:fill-color="#d8e8f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8%"/>
    </style:style>
    <style:style style:name="gr27" style:family="graphic" style:parent-style-name="standard">
      <style:graphic-properties draw:stroke="solid" svg:stroke-width="0.035cm" svg:stroke-color="#3a6a85" draw:stroke-linejoin="round" draw:fill="solid" draw:fill-color="#3a6a8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b0c8d8" draw:stroke-linejoin="round" draw:fill="solid" draw:fill-color="#d0ece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8%"/>
    </style:style>
    <style:style style:name="gr29" style:family="graphic" style:parent-style-name="standard">
      <style:graphic-properties draw:stroke="solid" svg:stroke-width="0.035cm" svg:stroke-color="#3a8a80" draw:stroke-linejoin="round" draw:fill="solid" draw:fill-color="#3a8a8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032cm" svg:stroke-color="#3a8a80" draw:stroke-linejoin="round" draw:fill="solid" draw:fill-color="#3a8a80" draw:textarea-vertical-align="middle" draw:auto-grow-height="false" draw:fit-to-size="false" style:shrink-to-fit="false" fo:min-height="0cm" fo:min-width="0cm" fo:padding-top="0.229cm" fo:padding-bottom="0.229cm" fo:padding-left="0.229cm" fo:padding-right="0.229cm" fo:wrap-option="wrap"/>
    </style:style>
    <style:style style:name="gr31" style:family="graphic" style:parent-style-name="standard">
      <style:graphic-properties draw:stroke="solid" svg:stroke-width="0.026cm" svg:stroke-color="#b0c8d8" draw:stroke-linejoin="round" draw:fill="solid" draw:fill-color="#d4ed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8%"/>
    </style:style>
    <style:style style:name="gr32" style:family="graphic" style:parent-style-name="standard">
      <style:graphic-properties draw:stroke="solid" svg:stroke-width="0.035cm" svg:stroke-color="#2e7d5a" draw:stroke-linejoin="round" draw:fill="solid" draw:fill-color="#2e7d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solid" svg:stroke-width="0.032cm" svg:stroke-color="#2e7d5a" draw:stroke-linejoin="round" draw:fill="solid" draw:fill-color="#2e7d5a" draw:textarea-vertical-align="middle" draw:auto-grow-height="false" draw:fit-to-size="false" style:shrink-to-fit="false" fo:min-height="0cm" fo:min-width="0cm" fo:padding-top="0.229cm" fo:padding-bottom="0.229cm" fo:padding-left="0.229cm" fo:padding-right="0.229cm" fo:wrap-option="wrap"/>
    </style:style>
    <style:style style:name="gr34" style:family="graphic" style:parent-style-name="standard">
      <style:graphic-properties draw:stroke="none" svg:stroke-width="0cm" draw:fill="solid" draw:fill-color="#3a6a85" draw:textarea-vertical-align="middle" draw:auto-grow-height="false" draw:fit-to-size="false" style:shrink-to-fit="false" fo:min-height="0cm" fo:min-width="0cm" fo:padding-top="0.229cm" fo:padding-bottom="0.229cm" fo:padding-left="0.229cm" fo:padding-right="0.229cm" fo:wrap-option="wrap"/>
    </style:style>
    <style:style style:name="gr35" style:family="graphic" style:parent-style-name="standard">
      <style:graphic-properties draw:stroke="solid" svg:stroke-width="0.035cm" svg:stroke-color="#a0c0d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solid" svg:stroke-width="0.035cm" svg:stroke-color="#7bafc5" draw:stroke-linejoin="round" draw:fill="solid" draw:fill-color="#7bafc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solid" svg:stroke-width="0.071cm" svg:stroke-color="#b0c8d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8cm" svg:stroke-color="#3a6a85" draw:stroke-linejoin="round" draw:fill="solid" draw:fill-color="#d8e8f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8%"/>
    </style:style>
    <style:style style:name="gr39" style:family="graphic" style:parent-style-name="standard">
      <style:graphic-properties draw:stroke="solid" svg:stroke-width="0.028cm" svg:stroke-color="#3a8a80" draw:stroke-linejoin="round" draw:fill="solid" draw:fill-color="#d0ece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8%"/>
    </style:style>
    <style:style style:name="gr40" style:family="graphic" style:parent-style-name="standard">
      <style:graphic-properties draw:stroke="solid" svg:stroke-width="0.028cm" svg:stroke-color="#2e7d5a" draw:stroke-linejoin="round" draw:fill="solid" draw:fill-color="#d4ed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8%"/>
    </style:style>
    <style:style style:name="gr41" style:family="graphic" style:parent-style-name="standard">
      <style:graphic-properties draw:stroke="solid" svg:stroke-width="0.026cm" svg:stroke-color="#b0c8d8" draw:stroke-linejoin="round" draw:fill="solid" draw:fill-color="#d8e8f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solid" svg:stroke-width="0.026cm" svg:stroke-color="#b0c8d8" draw:stroke-linejoin="round" draw:fill="solid" draw:fill-color="#f5e6d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8%"/>
    </style:style>
    <style:style style:name="gr43" style:family="graphic" style:parent-style-name="standard">
      <style:graphic-properties draw:stroke="solid" svg:stroke-width="0.035cm" svg:stroke-color="#c17a30" draw:stroke-linejoin="round" draw:fill="solid" draw:fill-color="#c17a3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none" svg:stroke-width="0cm" draw:fill="solid" draw:fill-color="#b6fcb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Slide_20_1_20_master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Slide_20_1_20_mast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Slide_20_2_20_mast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Slide_20_2_20_mast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Slide_20_3_20_mast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Slide_20_3_20_mast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Slide_20_5_20_mast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Slide_20_5_20_mast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Slide_20_10_20_mast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Slide_20_10_20_mast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Slide_20_1_20_mast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Slide_20_1_20_master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DEFAUL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DEFAUL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Slide_20_9_20_master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Slide_20_9_20_mast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d9edf2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52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faf9f5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fffff" draw:opacity="51%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1.058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2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1" style:family="paragraph">
      <style:paragraph-properties fo:margin-left="0cm" fo:margin-right="1.058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b6d6fc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22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41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41%" fo:text-align="start" fo:text-indent="0cm" style:writing-mode="lr-tb"/>
    </style:style>
    <style:style style:name="P29" style:family="paragraph">
      <loext:graphic-properties draw:fill="solid" draw:fill-color="#e7e6e6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3a6a85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3a8a80"/>
      <style:paragraph-properties fo:text-align="start" style:font-independent-line-spacing="true"/>
      <style:text-properties fo:font-size="14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solid" draw:fill-color="#2e7d5a"/>
      <style:paragraph-properties fo:text-align="start" style:font-independent-line-spacing="true"/>
      <style:text-properties fo:font-size="14pt"/>
    </style:style>
    <style:style style:name="P34" style:family="paragraph">
      <loext:graphic-properties draw:fill="solid" draw:fill-color="#d8e8f0"/>
      <style:paragraph-properties fo:text-align="start" style:font-independent-line-spacing="true"/>
      <style:text-properties fo:font-size="14pt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6" style:family="paragraph">
      <loext:graphic-properties draw:fill="solid" draw:fill-color="#d0eceb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d4ede0"/>
      <style:paragraph-properties fo:text-align="start" style:font-independent-line-spacing="true"/>
      <style:text-properties fo:font-size="14pt"/>
    </style:style>
    <style:style style:name="P38" style:family="paragraph">
      <style:paragraph-properties fo:margin-left="1.058cm" fo:margin-right="1.058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1.058cm" fo:margin-right="1.058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2" style:family="paragraph">
      <loext:graphic-properties draw:fill="solid" draw:fill-color="#7bafc5"/>
      <style:paragraph-properties fo:text-align="start" style:font-independent-line-spacing="true"/>
      <style:text-properties fo:font-size="14pt"/>
    </style:style>
    <style:style style:name="P43" style:family="paragraph">
      <loext:graphic-properties draw:fill="solid" draw:fill-color="#f5e6d0"/>
      <style:paragraph-properties fo:text-align="start" style:font-independent-line-spacing="true"/>
      <style:text-properties fo:font-size="14pt"/>
    </style:style>
    <style:style style:name="P44" style:family="paragraph">
      <loext:graphic-properties draw:fill="solid" draw:fill-color="#c17a30"/>
      <style:paragraph-properties fo:text-align="start" style:font-independent-line-spacing="true"/>
      <style:text-properties fo:font-size="14pt"/>
    </style:style>
    <style:style style:name="P45" style:family="paragraph">
      <style:paragraph-properties fo:margin-left="0cm" fo:margin-right="0cm" fo:margin-top="0cm" fo:margin-bottom="0cm" fo:line-height="124%" fo:text-align="start" fo:text-indent="0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cm" fo:margin-bottom="0cm" fo:line-height="125%" fo:text-align="center" fo:text-indent="0cm" style:writing-mode="lr-tb">
        <style:tab-stops>
          <style:tab-stop style:position="0cm"/>
        </style:tab-stops>
      </style:paragraph-properties>
    </style:style>
    <style:style style:name="P47" style:family="paragraph">
      <loext:graphic-properties draw:fill="solid" draw:fill-color="#b6fcb8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2e3c4e" style:text-line-through-style="none" style:text-line-through-type="none" style:text-position="0% 100%" style:font-name="Host Grotesk" fo:font-size="27.5pt" fo:letter-spacing="normal" fo:font-style="normal" style:text-underline-style="none" fo:font-weight="normal" style:font-name-asian="Host Grotesk" style:font-size-asian="27.5pt" style:font-style-asian="normal" style:font-weight-asian="normal" style:font-name-complex="Host Grotesk" style:font-size-complex="27.5pt" style:font-style-complex="normal" style:font-weight-complex="normal"/>
    </style:style>
    <style:style style:name="T2" style:family="text">
      <style:text-properties fo:font-variant="normal" fo:text-transform="none" fo:color="#2e3c4e" style:text-line-through-style="none" style:text-line-through-type="none" style:text-position="0% 100%" style:font-name="Host Grotesk" fo:font-size="16.5pt" fo:letter-spacing="normal" fo:font-style="normal" style:text-underline-style="none" fo:font-weight="normal" style:font-name-asian="Host Grotesk" style:font-size-asian="16.5pt" style:font-style-asian="normal" style:font-weight-asian="normal" style:font-name-complex="Host Grotesk" style:font-size-complex="16.5pt" style:font-style-complex="normal" style:font-weight-complex="normal"/>
    </style:style>
    <style:style style:name="T3" style:family="text">
      <style:text-properties fo:font-variant="normal" fo:text-transform="none" fo:color="#384653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4" style:family="text">
      <style:text-properties fo:font-variant="normal" fo:text-transform="none" fo:color="#384653" style:text-line-through-style="none" style:text-line-through-type="none" style:text-position="0% 100%" style:font-name="Roboto" fo:font-size="11pt" fo:letter-spacing="normal" fo:font-style="normal" style:text-underline-style="none" fo:font-weight="bold" style:font-name-asian="Roboto" style:font-size-asian="11pt" style:font-style-asian="normal" style:font-weight-asian="bold" style:font-name-complex="Roboto" style:font-size-complex="11pt" style:font-style-complex="normal" style:font-weight-complex="bold"/>
    </style:style>
    <style:style style:name="T5" style:family="text">
      <style:text-properties fo:font-variant="normal" fo:text-transform="none" fo:color="#384653" style:text-line-through-style="none" style:text-line-through-type="none" style:text-position="0% 100%" style:font-name="Roboto" fo:font-size="8.5pt" fo:letter-spacing="normal" fo:font-style="normal" style:text-underline-style="none" fo:font-weight="normal" style:font-name-asian="Roboto" style:font-size-asian="8.5pt" style:font-style-asian="normal" style:font-weight-asian="normal" style:font-name-complex="Roboto" style:font-size-complex="8.5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ost Grotesk" fo:font-size="8pt" fo:letter-spacing="normal" fo:font-style="normal" style:text-underline-style="none" fo:font-weight="normal" style:font-name-asian="Host Grotesk" style:font-size-asian="8pt" style:font-style-asian="normal" style:font-weight-asian="normal" style:font-name-complex="Host Grotesk" style:font-size-complex="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ost Grotesk Medium" fo:font-size="7pt" fo:letter-spacing="normal" fo:font-style="normal" style:text-underline-style="none" fo:font-weight="normal" style:font-name-asian="Host Grotesk Medium" style:font-size-asian="7pt" style:font-style-asian="normal" style:font-weight-asian="normal" style:font-name-complex="Host Grotesk Medium" style:font-size-complex="7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ost Grotesk" fo:font-size="7pt" fo:letter-spacing="normal" fo:font-style="normal" style:text-underline-style="none" fo:font-weight="bold" style:font-name-asian="Host Grotesk" style:font-size-asian="7pt" style:font-style-asian="normal" style:font-weight-asian="bold" style:font-name-complex="Host Grotesk" style:font-size-complex="7pt" style:font-style-complex="normal" style:font-weight-complex="bold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ost Grotesk Medium" fo:font-size="11pt" fo:letter-spacing="normal" fo:font-style="normal" style:text-underline-style="none" fo:font-weight="normal" style:font-name-asian="Host Grotesk Medium" style:font-size-asian="11pt" style:font-style-asian="normal" style:font-weight-asian="normal" style:font-name-complex="Host Grotesk Medium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ost Grotesk" fo:font-size="6pt" fo:letter-spacing="normal" fo:font-style="normal" style:text-underline-style="none" fo:font-weight="bold" style:font-name-asian="Host Grotesk" style:font-size-asian="6pt" style:font-style-asian="normal" style:font-weight-asian="bold" style:font-name-complex="Host Grotesk" style:font-size-complex="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ost Grotesk" fo:font-size="6pt" fo:letter-spacing="normal" fo:font-style="normal" style:text-underline-style="none" fo:font-weight="normal" style:font-name-asian="Host Grotesk" style:font-size-asian="6pt" style:font-style-asian="normal" style:font-weight-asian="normal" style:font-name-complex="Host Grotesk" style:font-size-complex="6pt" style:font-style-complex="normal" style:font-weight-complex="normal"/>
    </style:style>
    <style:style style:name="T14" style:family="text">
      <style:text-properties fo:font-variant="normal" fo:text-transform="none" fo:color="#cc0000" style:text-line-through-style="none" style:text-line-through-type="none" style:text-position="0% 100%" style:font-name="Host Grotesk" fo:font-size="22pt" fo:letter-spacing="normal" fo:font-style="normal" style:text-underline-style="none" fo:font-weight="bold" style:font-name-asian="Host Grotesk" style:font-size-asian="22pt" style:font-style-asian="normal" style:font-weight-asian="bold" style:font-name-complex="Host Grotesk" style:font-size-complex="22pt" style:font-style-complex="normal" style:font-weight-complex="bold"/>
    </style:style>
    <style:style style:name="T15" style:family="text">
      <style:text-properties fo:font-variant="normal" fo:text-transform="none" fo:color="#384653" style:text-line-through-style="none" style:text-line-through-type="none" style:text-position="0% 100%" style:font-name="Host Grotesk" fo:font-size="8pt" fo:letter-spacing="normal" fo:font-style="normal" style:text-underline-style="none" fo:font-weight="normal" style:font-name-asian="Host Grotesk" style:font-size-asian="8pt" style:font-style-asian="normal" style:font-weight-asian="normal" style:font-name-complex="Host Grotesk" style:font-size-complex="8pt" style:font-style-complex="normal" style:font-weight-complex="normal"/>
    </style:style>
    <style:style style:name="T16" style:family="text">
      <style:text-properties fo:font-variant="normal" fo:text-transform="none" fo:color="#384653" style:text-line-through-style="none" style:text-line-through-type="none" style:text-position="0% 100%" style:font-name="Host Grotesk" fo:font-size="8pt" fo:letter-spacing="normal" fo:font-style="normal" style:text-underline-style="none" fo:font-weight="bold" style:font-name-asian="Host Grotesk" style:font-size-asian="8pt" style:font-style-asian="normal" style:font-weight-asian="bold" style:font-name-complex="Host Grotesk" style:font-size-complex="8pt" style:font-style-complex="normal" style:font-weight-complex="bold"/>
    </style:style>
    <style:style style:name="T17" style:family="text">
      <style:text-properties fo:font-variant="normal" fo:text-transform="none" fo:color="#384653" style:text-line-through-style="none" style:text-line-through-type="none" style:text-position="0% 100%" style:font-name="Host Grotesk Medium" fo:font-size="11.5pt" fo:letter-spacing="normal" fo:font-style="normal" style:text-underline-style="none" fo:font-weight="normal" style:font-name-asian="Host Grotesk Medium" style:font-size-asian="11.5pt" style:font-style-asian="normal" style:font-weight-asian="normal" style:font-name-complex="Host Grotesk Medium" style:font-size-complex="11.5pt" style:font-style-complex="normal" style:font-weight-complex="normal"/>
    </style:style>
    <style:style style:name="T18" style:family="text">
      <style:text-properties fo:font-variant="normal" fo:text-transform="none" fo:color="#384653" style:text-line-through-style="none" style:text-line-through-type="none" style:text-position="0% 100%" style:font-name="Host Grotesk" fo:font-size="9pt" fo:letter-spacing="normal" fo:font-style="normal" style:text-underline-style="none" fo:font-weight="normal" style:font-name-asian="Host Grotesk" style:font-size-asian="9pt" style:font-style-asian="normal" style:font-weight-asian="normal" style:font-name-complex="Host Grotesk" style:font-size-complex="9pt" style:font-style-complex="normal" style:font-weight-complex="normal"/>
    </style:style>
    <style:style style:name="T19" style:family="text">
      <style:text-properties fo:font-variant="normal" fo:text-transform="none" fo:color="#c2c0b6" style:text-line-through-style="none" style:text-line-through-type="none" style:text-position="0% 100%" style:font-name="Host Grotesk" fo:font-size="9pt" fo:letter-spacing="normal" fo:font-style="normal" style:text-underline-style="none" fo:font-weight="normal" style:font-name-asian="Host Grotesk" style:font-size-asian="9pt" style:font-style-asian="normal" style:font-weight-asian="normal" style:font-name-complex="Host Grotesk" style:font-size-complex="9pt" style:font-style-complex="normal" style:font-weight-complex="normal"/>
    </style:style>
    <style:style style:name="T20" style:family="text">
      <style:text-properties fo:font-variant="normal" fo:text-transform="none" fo:color="#a32d2d" style:text-line-through-style="none" style:text-line-through-type="none" style:text-position="0% 100%" style:font-name="Host Grotesk" fo:font-size="9pt" fo:letter-spacing="normal" fo:font-style="normal" style:text-underline-style="none" fo:font-weight="normal" style:font-name-asian="Host Grotesk" style:font-size-asian="9pt" style:font-style-asian="normal" style:font-weight-asian="normal" style:font-name-complex="Host Grotesk" style:font-size-complex="9pt" style:font-style-complex="normal" style:font-weight-complex="normal"/>
    </style:style>
    <style:style style:name="T21" style:family="text">
      <style:text-properties fo:font-variant="normal" fo:text-transform="none" fo:color="#2e3c4e" style:text-line-through-style="none" style:text-line-through-type="none" style:text-position="0% 100%" style:font-name="Host Grotesk" fo:font-size="9pt" fo:letter-spacing="normal" fo:font-style="normal" style:text-underline-style="none" fo:font-weight="normal" style:font-name-asian="Host Grotesk" style:font-size-asian="9pt" style:font-style-asian="normal" style:font-weight-asian="normal" style:font-name-complex="Host Grotesk" style:font-size-complex="9pt" style:font-style-complex="normal" style:font-weight-complex="normal"/>
    </style:style>
    <style:style style:name="T22" style:family="text">
      <style:text-properties fo:font-variant="normal" fo:text-transform="none" fo:color="#95ccda" style:text-line-through-style="none" style:text-line-through-type="none" style:text-position="0% 100%" style:font-name="Roboto" fo:font-size="8.5pt" fo:letter-spacing="normal" fo:font-style="normal" style:text-underline-style="none" fo:font-weight="normal" style:font-name-asian="Roboto" style:font-size-asian="8.5pt" style:font-style-asian="normal" style:font-weight-asian="normal" style:font-name-complex="Roboto" style:font-size-complex="8.5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font-variant="normal" fo:text-transform="none" fo:color="#384653" style:text-line-through-style="none" style:text-line-through-type="none" style:text-position="0% 100%" style:font-name="Host Grotesk" fo:font-size="13.5pt" fo:letter-spacing="normal" fo:font-style="normal" style:text-underline-style="none" fo:font-weight="normal" style:font-name-asian="Host Grotesk" style:font-size-asian="13.5pt" style:font-style-asian="normal" style:font-weight-asian="normal" style:font-name-complex="Host Grotesk" style:font-size-complex="13.5pt" style:font-style-complex="normal" style:font-weight-complex="normal"/>
    </style:style>
    <style:style style:name="T25" style:family="text">
      <style:text-properties fo:font-variant="normal" fo:text-transform="none" fo:color="#384653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7" style:family="text">
      <style:text-properties fo:font-variant="normal" fo:text-transform="none" fo:color="#d9d9d9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8" style:family="text">
      <style:text-properties fo:font-variant="normal" fo:text-transform="none" fo:color="#384653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31" style:family="text">
      <style:text-properties fo:font-variant="normal" fo:text-transform="none" fo:color="#384653" style:text-line-through-style="none" style:text-line-through-type="none" style:text-position="0% 100%" style:font-name="Host Grotesk" fo:font-size="11pt" fo:letter-spacing="normal" fo:font-style="normal" style:text-underline-style="none" fo:font-weight="normal" style:font-name-asian="Host Grotesk" style:font-size-asian="11pt" style:font-style-asian="normal" style:font-weight-asian="normal" style:font-name-complex="Host Grotesk" style:font-size-complex="11pt" style:font-style-complex="normal" style:font-weight-complex="normal"/>
    </style:style>
    <style:style style:name="T32" style:family="text">
      <style:text-properties fo:font-variant="normal" fo:text-transform="none" fo:color="#2e3c4e" style:text-line-through-style="none" style:text-line-through-type="none" style:text-position="0% 100%" style:font-name="Host Grotesk" fo:font-size="13.5pt" fo:letter-spacing="normal" fo:font-style="normal" style:text-underline-style="none" fo:font-weight="normal" style:font-name-asian="Host Grotesk" style:font-size-asian="13.5pt" style:font-style-asian="normal" style:font-weight-asian="normal" style:font-name-complex="Host Grotesk" style:font-size-complex="13.5pt" style:font-style-complex="normal" style:font-weight-complex="normal"/>
    </style:style>
    <style:style style:name="T33" style:family="text">
      <style:text-properties fo:font-variant="normal" fo:text-transform="none" fo:color="#2e3c4e" style:text-line-through-style="none" style:text-line-through-type="none" style:text-position="0% 100%" style:font-name="Host Grotesk" fo:font-size="22pt" fo:letter-spacing="normal" fo:font-style="normal" style:text-underline-style="none" fo:font-weight="normal" style:font-name-asian="Host Grotesk" style:font-size-asian="22pt" style:font-style-asian="normal" style:font-weight-asian="normal" style:font-name-complex="Host Grotesk" style:font-size-complex="22pt" style:font-style-complex="normal" style:font-weight-complex="normal"/>
    </style:style>
    <style:style style:name="T34" style:family="text">
      <style:text-properties fo:font-variant="normal" fo:text-transform="none" fo:color="#384653" style:text-line-through-style="none" style:text-line-through-type="none" style:text-position="0% 100%" style:font-name="Roboto" fo:font-size="7.5pt" fo:letter-spacing="normal" fo:font-style="normal" style:text-underline-style="none" fo:font-weight="normal" style:font-name-asian="Roboto" style:font-size-asian="7.5pt" style:font-style-asian="normal" style:font-weight-asian="normal" style:font-name-complex="Roboto" style:font-size-complex="7.5pt" style:font-style-complex="normal" style:font-weight-complex="normal"/>
    </style:style>
    <style:style style:name="T35" style:family="text">
      <style:text-properties fo:font-variant="normal" fo:text-transform="none" fo:color="#384653" style:text-line-through-style="none" style:text-line-through-type="none" style:text-position="0% 100%" style:font-name="Host Grotesk" fo:font-size="13.5pt" fo:letter-spacing="normal" fo:font-style="normal" style:text-underline-style="none" fo:font-weight="bold" style:font-name-asian="Host Grotesk" style:font-size-asian="13.5pt" style:font-style-asian="normal" style:font-weight-asian="bold" style:font-name-complex="Host Grotesk" style:font-size-complex="13.5pt" style:font-style-complex="normal" style:font-weight-complex="bold"/>
    </style:style>
    <style:style style:name="T36" style:family="text">
      <style:text-properties fo:font-variant="normal" fo:text-transform="none" fo:color="#384653" style:text-line-through-style="none" style:text-line-through-type="none" style:text-position="0% 100%" style:font-name="Roboto" fo:font-size="11.5pt" fo:letter-spacing="normal" fo:font-style="normal" style:text-underline-style="none" fo:font-weight="normal" style:font-name-asian="Roboto" style:font-size-asian="11.5pt" style:font-style-asian="normal" style:font-weight-asian="normal" style:font-name-complex="Roboto" style:font-size-complex="11.5pt" style:font-style-complex="normal" style:font-weight-complex="normal"/>
    </style:style>
    <style:style style:name="T37" style:family="text">
      <style:text-properties fo:font-variant="normal" fo:text-transform="none" fo:color="#384653" style:text-line-through-style="none" style:text-line-through-type="none" style:text-position="0% 100%" style:font-name="Roboto" fo:font-size="9.5pt" fo:letter-spacing="normal" fo:font-style="normal" style:text-underline-style="none" fo:font-weight="normal" style:font-name-asian="Roboto" style:font-size-asian="9.5pt" style:font-style-asian="normal" style:font-weight-asian="normal" style:font-name-complex="Roboto" style:font-size-complex="9.5pt" style:font-style-complex="normal" style:font-weight-complex="normal"/>
    </style:style>
    <style:style style:name="T38" style:family="text">
      <style:text-properties fo:font-variant="normal" fo:text-transform="none" fo:color="#384653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Roboto" fo:font-size="11pt" fo:letter-spacing="normal" fo:font-style="normal" style:text-underline-style="none" fo:font-weight="bold" style:font-name-asian="Roboto" style:font-size-asian="11pt" style:font-style-asian="normal" style:font-weight-asian="bold" style:font-name-complex="Roboto" style:font-size-complex="11pt" style:font-style-complex="normal" style:font-weight-complex="bold"/>
    </style:style>
    <style:style style:name="T40" style:family="text">
      <style:text-properties fo:font-variant="normal" fo:text-transform="none" fo:color="#2c3e50" style:text-line-through-style="none" style:text-line-through-type="none" style:text-position="0% 100%" style:font-name="Host Grotesk" fo:font-size="26pt" fo:letter-spacing="normal" fo:font-style="normal" style:text-underline-style="none" fo:font-weight="normal" style:font-name-asian="Host Grotesk" style:font-size-asian="26pt" style:font-style-asian="normal" style:font-weight-asian="normal" style:font-name-complex="Host Grotesk" style:font-size-complex="26pt" style:font-style-complex="normal" style:font-weight-complex="normal"/>
    </style:style>
    <style:style style:name="T41" style:family="text">
      <style:text-properties fo:font-variant="normal" fo:text-transform="none" fo:color="#44546a" style:text-line-through-style="none" style:text-line-through-type="none" style:text-position="0% 100%" style:font-name="Host Grotesk" fo:font-size="12pt" fo:letter-spacing="normal" fo:font-style="normal" style:text-underline-style="none" fo:font-weight="bold" style:font-name-asian="Host Grotesk" style:font-size-asian="12pt" style:font-style-asian="normal" style:font-weight-asian="bold" style:font-name-complex="Host Grotesk" style:font-size-complex="12pt" style:font-style-complex="normal" style:font-weight-complex="bold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3" style:family="text">
      <style:text-properties fo:font-variant="normal" fo:text-transform="none" fo:color="#2c3e50" style:text-line-through-style="none" style:text-line-through-type="none" style:text-position="0% 100%" style:font-name="Roboto Medium" fo:font-size="11pt" fo:letter-spacing="normal" fo:font-style="normal" style:text-underline-style="none" fo:font-weight="normal" style:font-name-asian="Roboto Medium" style:font-size-asian="11pt" style:font-style-asian="normal" style:font-weight-asian="normal" style:font-name-complex="Roboto Medium" style:font-size-complex="11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45" style:family="text">
      <style:text-properties fo:font-variant="normal" fo:text-transform="none" fo:color="#3a6a85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46" style:family="text">
      <style:text-properties fo:font-variant="normal" fo:text-transform="none" fo:color="#4a5a6a" style:text-line-through-style="none" style:text-line-through-type="none" style:text-position="0% 100%" style:font-name="Host Grotesk Medium" fo:font-size="9.5pt" fo:letter-spacing="normal" fo:font-style="normal" style:text-underline-style="none" fo:font-weight="normal" style:font-name-asian="Host Grotesk Medium" style:font-size-asian="9.5pt" style:font-style-asian="normal" style:font-weight-asian="normal" style:font-name-complex="Host Grotesk Medium" style:font-size-complex="9.5pt" style:font-style-complex="normal" style:font-weight-complex="normal"/>
    </style:style>
    <style:style style:name="T47" style:family="text">
      <style:text-properties fo:font-variant="normal" fo:text-transform="none" fo:color="#3a8a8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48" style:family="text">
      <style:text-properties fo:font-variant="normal" fo:text-transform="none" fo:color="#2e7d5a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49" style:family="text">
      <style:text-properties fo:font-variant="normal" fo:text-transform="none" fo:color="#384653" style:text-line-through-style="none" style:text-line-through-type="none" style:text-position="0% 100%" style:font-name="Roboto" fo:font-size="10pt" fo:letter-spacing="normal" fo:font-style="normal" style:text-underline-style="solid" style:text-underline-width="auto" style:text-underline-color="font-color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50" style:family="text">
      <style:text-properties fo:font-variant="normal" fo:text-transform="none" fo:color="#384653" style:text-line-through-style="none" style:text-line-through-type="none" style:text-position="0% 100%" style:font-name="Roboto" fo:font-size="9pt" fo:letter-spacing="normal" fo:font-style="normal" style:text-underline-style="none" fo:font-weight="normal" style:font-name-asian="Roboto" style:font-size-asian="9pt" style:font-style-asian="normal" style:font-weight-asian="normal" style:font-name-complex="Roboto" style:font-size-complex="9pt" style:font-style-complex="normal" style:font-weight-complex="normal"/>
    </style:style>
    <style:style style:name="T51" style:family="text">
      <style:text-properties fo:font-variant="normal" fo:text-transform="none" fo:color="#607080" style:text-line-through-style="none" style:text-line-through-type="none" style:text-position="0% 100%" style:font-name="Calibri" fo:font-size="8pt" fo:letter-spacing="normal" fo:font-style="normal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/>
    </style:style>
    <style:style style:name="T52" style:family="text">
      <style:text-properties fo:font-variant="normal" fo:text-transform="none" fo:color="#2c3e50" style:text-line-through-style="none" style:text-line-through-type="none" style:text-position="0% 100%" style:font-name="Calibri" fo:font-size="34pt" fo:letter-spacing="normal" fo:font-style="normal" style:text-underline-style="none" fo:font-weight="normal" style:font-name-asian="Calibri" style:font-size-asian="34pt" style:font-style-asian="normal" style:font-weight-asian="normal" style:font-name-complex="Calibri" style:font-size-complex="34pt" style:font-style-complex="normal" style:font-weight-complex="normal"/>
    </style:style>
    <style:style style:name="T53" style:family="text">
      <style:text-properties fo:font-variant="normal" fo:text-transform="none" fo:color="#5b8fa8" style:text-line-through-style="none" style:text-line-through-type="none" style:text-position="0% 100%" style:font-name="Calibri" fo:font-size="11.5pt" fo:letter-spacing="normal" fo:font-style="italic" style:text-underline-style="none" fo:font-weight="normal" style:font-name-asian="Calibri" style:font-size-asian="11.5pt" style:font-style-asian="italic" style:font-weight-asian="normal" style:font-name-complex="Calibri" style:font-size-complex="11.5pt" style:font-style-complex="italic" style:font-weight-complex="normal"/>
    </style:style>
    <style:style style:name="T54" style:family="text">
      <style:text-properties fo:font-variant="normal" fo:text-transform="none" fo:color="#3a6a85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55" style:family="text">
      <style:text-properties fo:font-variant="normal" fo:text-transform="none" fo:color="#4a5a6a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56" style:family="text">
      <style:text-properties fo:font-variant="normal" fo:text-transform="none" fo:color="#4a5a6a" style:text-line-through-style="none" style:text-line-through-type="none" style:text-position="0% 100%" style:font-name="Calibri" fo:font-size="9.5pt" fo:letter-spacing="normal" fo:font-style="normal" style:text-underline-style="none" fo:font-weight="normal" style:font-name-asian="Calibri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57" style:family="text">
      <style:text-properties fo:font-variant="normal" fo:text-transform="none" fo:color="#3a8a8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58" style:family="text">
      <style:text-properties fo:font-variant="normal" fo:text-transform="none" fo:color="#2e7d5a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59" style:family="text">
      <style:text-properties fo:font-variant="normal" fo:text-transform="none" fo:color="#3a6a85" style:text-line-through-style="none" style:text-line-through-type="none" style:text-position="0% 100%" style:font-name="Calibri" fo:font-size="9pt" fo:letter-spacing="normal" fo:font-style="italic" style:text-underline-style="none" fo:font-weight="normal" style:font-name-asian="Calibri" style:font-size-asian="9pt" style:font-style-asian="italic" style:font-weight-asian="normal" style:font-name-complex="Calibri" style:font-size-complex="9pt" style:font-style-complex="italic" style:font-weight-complex="normal"/>
    </style:style>
    <style:style style:name="T60" style:family="text">
      <style:text-properties fo:font-variant="normal" fo:text-transform="none" fo:color="#2c3e5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61" style:family="text">
      <style:text-properties fo:font-variant="normal" fo:text-transform="none" fo:color="#5b8fa8" style:text-line-through-style="none" style:text-line-through-type="none" style:text-position="0% 100%" style:font-name="Calibri" fo:font-size="12pt" fo:letter-spacing="normal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62" style:family="text">
      <style:text-properties fo:font-variant="normal" fo:text-transform="none" fo:color="#2c3e50" style:text-line-through-style="none" style:text-line-through-type="none" style:text-position="0% 100%" style:font-name="Calibri" fo:font-size="13pt" fo:letter-spacing="normal" fo:font-style="normal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63" style:family="text">
      <style:text-properties fo:font-variant="normal" fo:text-transform="none" fo:color="#4a5a6a" style:text-line-through-style="none" style:text-line-through-type="none" style:text-position="0% 100%" style:font-name="Calibri" fo:font-size="10.5pt" fo:letter-spacing="normal" fo:font-style="normal" style:text-underline-style="none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64" style:family="text">
      <style:text-properties fo:font-variant="normal" fo:text-transform="none" fo:color="#95ccda" style:text-line-through-style="none" style:text-line-through-type="none" style:text-position="0% 100%" style:font-name="Roboto" fo:font-size="4pt" fo:letter-spacing="normal" fo:font-style="normal" style:text-underline-style="none" fo:font-weight="normal" style:font-name-asian="Roboto" style:font-size-asian="4pt" style:font-style-asian="normal" style:font-weight-asian="normal" style:font-name-complex="Roboto" style:font-size-complex="4pt" style:font-style-complex="normal" style:font-weight-complex="normal"/>
    </style:style>
    <style:style style:name="T65" style:family="text">
      <style:text-properties fo:font-variant="normal" fo:text-transform="none" fo:color="#2e3c4e" style:text-line-through-style="none" style:text-line-through-type="none" style:text-position="0% 100%" style:font-name="Host Grotesk" fo:font-size="12.5pt" fo:letter-spacing="normal" fo:font-style="normal" style:text-underline-style="none" fo:font-weight="normal" style:font-name-asian="Host Grotesk" style:font-size-asian="12.5pt" style:font-style-asian="normal" style:font-weight-asian="normal" style:font-name-complex="Host Grotesk" style:font-size-complex="12.5pt" style:font-style-complex="normal" style:font-weight-complex="normal"/>
    </style:style>
    <style:style style:name="T66" style:family="text">
      <style:text-properties fo:font-variant="normal" fo:text-transform="none" fo:color="#384653" style:text-line-through-style="none" style:text-line-through-type="none" style:text-position="0% 100%" style:font-name="Roboto" fo:font-size="5pt" fo:letter-spacing="normal" fo:font-style="normal" style:text-underline-style="none" fo:font-weight="normal" style:font-name-asian="Roboto" style:font-size-asian="5pt" style:font-style-asian="normal" style:font-weight-asian="normal" style:font-name-complex="Roboto" style:font-size-complex="5pt" style:font-style-complex="normal" style:font-weight-complex="normal"/>
    </style:style>
    <style:style style:name="T67" style:family="text">
      <style:text-properties fo:font-variant="normal" fo:text-transform="none" fo:color="#384653" style:text-line-through-style="none" style:text-line-through-type="none" style:text-position="0% 100%" style:font-name="Roboto" fo:font-size="5pt" fo:letter-spacing="normal" fo:font-style="normal" style:text-underline-style="none" fo:font-weight="bold" style:font-name-asian="Roboto" style:font-size-asian="5pt" style:font-style-asian="normal" style:font-weight-asian="bold" style:font-name-complex="Roboto" style:font-size-complex="5pt" style:font-style-complex="normal" style:font-weight-complex="bold"/>
    </style:style>
    <style:style style:name="T68" style:family="text">
      <style:text-properties fo:font-variant="normal" fo:text-transform="none" fo:color="#384653" style:text-line-through-style="none" style:text-line-through-type="none" style:text-position="0% 100%" style:font-name="Host Grotesk" fo:font-size="6pt" fo:letter-spacing="normal" fo:font-style="normal" style:text-underline-style="none" fo:font-weight="normal" style:font-name-asian="Host Grotesk" style:font-size-asian="6pt" style:font-style-asian="normal" style:font-weight-asian="normal" style:font-name-complex="Host Grotesk" style:font-size-complex="6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Roboto" fo:font-size="5pt" fo:letter-spacing="normal" fo:font-style="normal" style:text-underline-style="none" fo:font-weight="normal" style:font-name-asian="Roboto" style:font-size-asian="5pt" style:font-style-asian="normal" style:font-weight-asian="normal" style:font-name-complex="Roboto" style:font-size-complex="5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Roboto" fo:font-size="5pt" fo:letter-spacing="normal" fo:font-style="normal" style:text-underline-style="none" fo:font-weight="bold" style:font-name-asian="Roboto" style:font-size-asian="5pt" style:font-style-asian="normal" style:font-weight-asian="bold" style:font-name-complex="Roboto" style:font-size-complex="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2e3c4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95ccd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1cm" text:min-label-width="0.447cm"/>
        <style:text-properties style:font-name="Consolas" fo:color="#3846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1cm" text:min-label-width="0.447cm"/>
        <style:text-properties style:font-name="Consolas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1cm" text:min-label-width="0.44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2e3c4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95ccd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2e3c4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33cm" text:min-label-width="0.837cm"/>
        <style:text-properties style:font-name="Roboto" fo:color="#3846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433cm" text:min-label-width="0.837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433cm" text:min-label-width="0.837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2c3e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a8c0d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3a6a8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•">
        <style:list-level-properties text:space-before="0.001cm" text:min-label-width="0.952cm"/>
        <style:text-properties style:font-name="Host Grotesk Medium" fo:color="#4a5a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6cm"/>
        <style:text-properties fo:color="#3a8a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min-label-width="0.6cm"/>
        <style:text-properties fo:color="#2e7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min-label-width="0.6cm"/>
        <style:text-properties fo:color="#607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min-label-width="0.6cm"/>
        <style:text-properties fo:color="#2c3e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min-label-width="0.6cm"/>
        <style:text-properties fo:color="#5b8fa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min-label-width="0.6cm"/>
        <style:text-properties fo:color="#3a6a8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number text:level="1" style:num-format="">
        <style:list-level-properties text:min-label-width="0.6cm"/>
        <style:text-properties fo:color="#4a5a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•">
        <style:list-level-properties text:space-before="0.001cm" text:min-label-width="0.952cm"/>
        <style:text-properties style:font-name="Calibri" fo:color="#4a5a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format="">
        <style:list-level-properties text:min-label-width="0.6cm"/>
        <style:text-properties fo:color="#3a8a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format="">
        <style:list-level-properties text:min-label-width="0.6cm"/>
        <style:text-properties fo:color="#2e7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number text:level="1" style:num-format="">
        <style:list-level-properties text:min-label-width="0.6cm"/>
        <style:text-properties fo:color="#3a6a8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number text:level="1" style:num-format="">
        <style:list-level-properties text:min-label-width="0.6cm"/>
        <style:text-properties fo:color="#2c3e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number text:level="1" style:num-format="">
        <style:list-level-properties text:min-label-width="0.6cm"/>
        <style:text-properties fo:color="#5b8fa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number text:level="1" style:num-format="">
        <style:list-level-properties text:min-label-width="0.6cm"/>
        <style:text-properties fo:color="#2c3e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number text:level="1" style:num-format="">
        <style:list-level-properties text:min-label-width="0.6cm"/>
        <style:text-properties fo:color="#95ccd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number text:level="1" style:num-format="">
        <style:list-level-properties text:min-label-width="0.6cm"/>
        <style:text-properties fo:color="#2e3c4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number text:level="1" style:num-format="">
        <style:list-level-properties text:min-label-width="0.6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number text:level="1" style:num-format="">
        <style:list-level-properties text:min-label-width="0.6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1_20_master">
        <draw:frame draw:name="Google Shape;60;p14" draw:style-name="gr1" draw:text-style-name="P1" draw:layer="layout" svg:width="10cm" svg:height="14.287cm" svg:x="0cm" svg:y="0cm">
          <draw:image xlink:href="Pictures/10000201000005E800000870F82ECE8A1810778B.png" xlink:type="simple" xlink:show="embed" xlink:actuate="onLoad">
            <text:p/>
          </draw:image>
        </draw:frame>
        <draw:custom-shape draw:name="Google Shape;61;p14" draw:style-name="gr2" draw:text-style-name="P3" draw:layer="layout" svg:width="13.118cm" svg:height="2.46cm" svg:x="10.903cm" svg:y="4.452cm">
          <text:p text:style-name="P2"><text:span text:style-name="T1">NPS Preditivo</text:span></text:p>
          <text:p text:style-name="P2"><text:span text:style-name="T2">Tech Challenge Fas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2" draw:text-style-name="P3" draw:layer="layout" svg:width="13.118cm" svg:height="1.18cm" svg:x="10.903cm" svg:y="7.503cm">
          <text:p text:style-name="P4"><text:span text:style-name="T3">Como dados operacionais de logística e atendimento podem </text:span><text:span text:style-name="T4">antecipar a satisfação do cliente</text:span><text:span text:style-name="T3"> antes da pesquisa de NP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3" draw:text-style-name="P5" draw:layer="layout" svg:width="3.586cm" svg:height="0.707cm" svg:x="10.903cm" svg:y="9.113cm">
          <text:p text:style-name="P11"/>
          <draw:enhanced-geometry draw:mirror-horizontal="false" draw:mirror-vertical="false" draw:text-areas="?f5 ?f5 ?f6 ?f7" svg:viewBox="0 0 0 0" draw:type="ooxml-roundRect" draw:modifiers="186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4;p14" draw:style-name="gr4" draw:text-style-name="P3" draw:layer="layout" svg:width="3.225cm" svg:height="0.341cm" svg:x="11.139cm" svg:y="9.296cm">
          <text:p text:style-name="P6"><text:span text:style-name="T5">POSTECH · FIAP· IAS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3" draw:text-style-name="P5" draw:layer="layout" svg:width="1.927cm" svg:height="0.707cm" svg:x="14.581cm" svg:y="9.113cm">
          <text:p text:style-name="P11"/>
          <draw:enhanced-geometry draw:mirror-horizontal="false" draw:mirror-vertical="false" draw:text-areas="?f5 ?f5 ?f6 ?f7" svg:viewBox="0 0 0 0" draw:type="ooxml-roundRect" draw:modifiers="186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;p14" draw:style-name="gr2" draw:text-style-name="P3" draw:layer="layout" svg:width="1.472cm" svg:height="0.341cm" svg:x="14.817cm" svg:y="9.296cm">
          <text:p text:style-name="P6"><text:span text:style-name="T5">Grupo 19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3" draw:text-style-name="P5" draw:layer="layout" svg:width="5.604cm" svg:height="1.18cm" svg:x="10.903cm" svg:y="10.039cm">
          <text:p text:style-name="P11"/>
          <draw:enhanced-geometry draw:mirror-horizontal="false" draw:mirror-vertical="false" draw:text-areas="?f5 ?f5 ?f6 ?f7" svg:viewBox="0 0 0 0" draw:type="ooxml-roundRect" draw:modifiers="186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;p14" draw:style-name="gr2" draw:text-style-name="P3" draw:layer="layout" svg:width="5.427cm" svg:height="1.063cm" svg:x="11.139cm" svg:y="10.213cm">
          <text:p text:style-name="P6"><text:span text:style-name="T5">Julio Cesar de Oliveira Matos </text:span></text:p>
          <text:p text:style-name="P6"><text:span text:style-name="T5">Saulo Freitas e Sil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2" draw:text-style-name="P3" draw:layer="layout" svg:width="1.179cm" svg:height="1.063cm" svg:x="15.251cm" svg:y="10.213cm">
          <text:p text:style-name="P6"><text:span text:style-name="T5">369221</text:span></text:p>
          <text:p text:style-name="P6"><text:span text:style-name="T5">3723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p1:notes" draw:style-name="gr6" draw:layer="layout" svg:width="15.239cm" svg:height="8.572cm" svg:x="1.905cm" svg:y="3.175cm" draw:page-number="1" presentation:class="page"/>
          <draw:frame draw:name="Google Shape;57;p1:notes" presentation:style-name="pr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58;p1:notes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Slide_20_2_20_master">
        <draw:custom-shape draw:name="Google Shape;76;p15" draw:style-name="gr7" draw:text-style-name="P5" draw:layer="layout" svg:width="7.412cm" svg:height="4.694cm" svg:x="15.231cm" svg:y="4.031cm">
          <text:p text:style-name="P11"/>
          <draw:enhanced-geometry draw:mirror-horizontal="false" draw:mirror-vertical="false" draw:text-areas="?f5 ?f5 ?f6 ?f7" svg:viewBox="0 0 0 0" draw:type="ooxml-roundRect" draw:modifiers="61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7;p15" draw:style-name="gr2" draw:text-style-name="P3" draw:layer="layout" svg:width="10.768cm" svg:height="1.23cm" svg:x="1.378cm" svg:y="2.37cm">
          <text:p text:style-name="P2"><text:span text:style-name="T1">O Problema de Negóc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7" draw:text-style-name="P5" draw:layer="layout" svg:width="7.412cm" svg:height="8.367cm" svg:x="2.757cm" svg:y="4.031cm">
          <text:p text:style-name="P11"/>
          <draw:enhanced-geometry draw:mirror-horizontal="false" draw:mirror-vertical="false" draw:text-areas="?f5 ?f5 ?f6 ?f7" svg:viewBox="0 0 0 0" draw:type="ooxml-roundRect" draw:modifiers="61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9;p15" draw:style-name="gr8" draw:text-style-name="P3" draw:layer="layout" svg:width="5.146cm" svg:height="1.325cm" svg:x="4.263cm" svg:y="4.484cm">
          <text:p text:style-name="P11"><text:span text:style-name="T7">Crescimento acelerado do e-commerce trouxe mais pedidos, entregas e interações com clien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8" draw:text-style-name="P3" draw:layer="layout" svg:width="5.146cm" svg:height="1.325cm" svg:x="4.263cm" svg:y="5.868cm">
          <text:p text:style-name="P11"><text:span text:style-name="T7">Mesmo com indicadores semelhantes, alguns clientes viram promotores e outros detrat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8" draw:text-style-name="P3" draw:layer="layout" svg:width="5.146cm" svg:height="1.325cm" svg:x="4.263cm" svg:y="7.253cm">
          <text:p text:style-name="P11"><text:span text:style-name="T7">O NPS é coletado somente após o encerramento da jornada, quando já é tarde para ag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2" draw:text-style-name="P3" draw:layer="layout" svg:width="3.194cm" svg:height="0.477cm" svg:x="3.629cm" svg:y="11.085cm">
          <text:p text:style-name="P2"><text:span text:style-name="T8">Fórmula do N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5" draw:style-name="gr9" draw:text-style-name="P12" draw:layer="layout" svg:width="5.667cm" svg:height="0.014cm" svg:x="3.629cm" svg:y="10.947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5" draw:style-name="gr2" draw:text-style-name="P3" draw:layer="layout" svg:width="5.667cm" svg:height="0.299cm" svg:x="3.629cm" svg:y="11.606cm">
          <text:p text:style-name="P4"><text:span text:style-name="T9">NPS = % Promotores − % Detrat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5" draw:style-name="gr10" draw:text-style-name="P3" draw:layer="layout" svg:width="0.747cm" svg:height="1.482cm" svg:x="3.354cm" svg:y="4.467cm">
          <text:p text:style-name="P1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5" draw:style-name="gr10" draw:text-style-name="P3" draw:layer="layout" svg:width="0.747cm" svg:height="1.482cm" svg:x="3.354cm" svg:y="5.836cm">
          <text:p text:style-name="P11"><text:span text:style-name="T1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5" draw:style-name="gr10" draw:text-style-name="P3" draw:layer="layout" svg:width="0.747cm" svg:height="1.482cm" svg:x="3.354cm" svg:y="7.129cm">
          <text:p text:style-name="P11"><text:span text:style-name="T1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5" draw:style-name="gr11" draw:text-style-name="P1" draw:layer="layout" svg:width="6.178cm" svg:height="0.001cm" svg:x="3.373cm" svg:y="8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5" draw:style-name="gr10" draw:text-style-name="P3" draw:layer="layout" svg:width="5.042cm" svg:height="0.974cm" svg:x="15.625cm" svg:y="4.34cm">
          <text:p text:style-name="P11"><text:span text:style-name="T11">Por que é urgent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5" draw:style-name="gr12" draw:text-style-name="P13" draw:layer="layout" svg:width="2.784cm" svg:height="0.507cm" svg:x="4.762cm" svg:y="9.032cm">
          <text:p text:style-name="P11"><text:span text:style-name="T12">Promotores</text:span><text:span text:style-name="T13"> (9–10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2;p15" draw:style-name="gr13" draw:text-style-name="P14" draw:layer="layout" svg:width="2.784cm" svg:height="0.507cm" svg:x="4.762cm" svg:y="10.181cm">
          <text:p text:style-name="P11"><text:span text:style-name="T12">Detratores</text:span><text:span text:style-name="T13"> (0–6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3;p15" draw:style-name="gr14" draw:text-style-name="P15" draw:layer="layout" svg:width="2.784cm" svg:height="0.507cm" svg:x="4.762cm" svg:y="9.607cm">
          <text:p text:style-name="P11"><text:span text:style-name="T12">Neutros</text:span><text:span text:style-name="T13"> (7–8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4;p15" draw:style-name="gr10" draw:text-style-name="P3" draw:layer="layout" svg:width="2.295cm" svg:height="1.44cm" svg:x="15.823cm" svg:y="5.359cm">
          <text:p text:style-name="P11"><text:span text:style-name="T14">8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5" draw:style-name="gr8" draw:text-style-name="P3" draw:layer="layout" svg:width="3.999cm" svg:height="0.734cm" svg:x="18.119cm" svg:y="5.718cm">
          <text:p text:style-name="P11"><text:span text:style-name="T7">dos clientes são detrat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5" draw:style-name="gr8" draw:text-style-name="P3" draw:layer="layout" svg:width="6.178cm" svg:height="0.734cm" svg:x="15.935cm" svg:y="6.785cm">
          <text:p text:style-name="P11"><text:span text:style-name="T15">A cada 100 clientes, </text:span><text:span text:style-name="T16">apenas 20 estão dispostos</text:span><text:span text:style-name="T15"> a realizar uma recompr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5" draw:style-name="gr7" draw:text-style-name="P5" draw:layer="layout" svg:width="7.412cm" svg:height="3.417cm" svg:x="15.231cm" svg:y="8.981cm">
          <text:p text:style-name="P11"/>
          <draw:enhanced-geometry draw:mirror-horizontal="false" draw:mirror-vertical="false" draw:text-areas="?f5 ?f5 ?f6 ?f7" svg:viewBox="0 0 0 0" draw:type="ooxml-roundRect" draw:modifiers="61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8;p15" draw:style-name="gr10" draw:text-style-name="P3" draw:layer="layout" svg:width="6.749cm" svg:height="2.557cm" svg:x="15.625cm" svg:y="9.373cm">
          <text:p text:style-name="P16"><text:span text:style-name="T17">Impacto no negócio</text:span></text:p>
          <text:p text:style-name="P17"><text:span text:style-name="T18">Recompra</text:span><text:span text:style-name="T18"><text:tab/></text:span><text:span text:style-name="T19"><text:tab/></text:span><text:span text:style-name="T20">em risco</text:span></text:p>
          <text:p text:style-name="P16"><text:span text:style-name="T18">Reputação da marca</text:span><text:span text:style-name="T19"><text:tab/></text:span><text:span text:style-name="T20">em risco</text:span></text:p>
          <text:p text:style-name="P16"><text:span text:style-name="T21">Crescimento orgânico</text:span><text:span text:style-name="T19"><text:tab/></text:span><text:span text:style-name="T20">em ris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5" draw:style-name="gr15" draw:text-style-name="P3" draw:layer="layout" svg:width="2.43cm" svg:height="0.734cm" svg:x="1.378cm" svg:y="1.472cm">
          <text:p text:style-name="P11"/>
          <draw:enhanced-geometry draw:mirror-horizontal="false" draw:mirror-vertical="false" draw:text-areas="?f5 ?f5 ?f6 ?f7" svg:viewBox="0 0 0 0" draw:type="ooxml-roundRect" draw:modifiers="18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0;p15" draw:style-name="gr4" draw:text-style-name="P3" draw:layer="layout" svg:width="1.931cm" svg:height="0.472cm" svg:x="1.628cm" svg:y="1.603cm">
          <text:p text:style-name="P11"><text:span text:style-name="T22">O PROBL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3e7a2f80275_0_3:notes" draw:style-name="gr6" draw:layer="layout" svg:width="15.239cm" svg:height="8.572cm" svg:x="1.905cm" svg:y="3.175cm" draw:page-number="2" presentation:class="page"/>
          <draw:frame draw:name="Google Shape;73;g3e7a2f80275_0_3:notes" presentation:style-name="pr3" draw:text-style-name="P19" draw:layer="layout" svg:width="15.239cm" svg:height="10.001cm" svg:x="1.905cm" svg:y="12.224cm" presentation:class="notes" presentation:user-transformed="true">
            <draw:text-box>
              <text:p text:style-name="P18"><text:span text:style-name="T23">Passamos por um crescimento acelerado, aumentando o volume de pedidos, entrega e interações com o cliente. Junto desse crescimento, o NPS da empresa também foi afetado, com alta variabilidade e um fator de NPS muito abaixo do mercado, sendo este um indicador importante para e-commerce. Além do fato de termos o NPS apenas após o fim da jornada do cliente, tarde demais para revertermos a situação.</text:span></text:p>
            </draw:text-box>
          </draw:frame>
          <draw:frame draw:name="Google Shape;74;g3e7a2f80275_0_3:notes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Slide_20_3_20_master">
        <draw:custom-shape draw:name="Google Shape;106;p16" draw:style-name="gr15" draw:text-style-name="P3" draw:layer="layout" svg:width="2.895cm" svg:height="0.707cm" svg:x="1.378cm" svg:y="1.499cm">
          <text:p text:style-name="P11"/>
          <draw:enhanced-geometry draw:mirror-horizontal="false" draw:mirror-vertical="false" draw:text-areas="?f5 ?f5 ?f6 ?f7" svg:viewBox="0 0 0 0" draw:type="ooxml-roundRect" draw:modifiers="18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7;p16" draw:style-name="gr2" draw:text-style-name="P3" draw:layer="layout" svg:width="1.018cm" svg:height="0.472cm" svg:x="2.316cm" svg:y="1.678cm">
          <text:p text:style-name="P6"><text:span text:style-name="T22">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2" draw:text-style-name="P3" draw:layer="layout" svg:width="15.072cm" svg:height="1.23cm" svg:x="1.378cm" svg:y="2.336cm">
          <text:p text:style-name="P2"><text:span text:style-name="T1">O que temo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6" draw:style-name="gr2" draw:text-style-name="P3" draw:layer="layout" svg:width="22.643cm" svg:height="1.193cm" svg:x="1.378cm" svg:y="4.157cm">
          <text:p text:style-name="P4"><text:span text:style-name="T3">A base contém </text:span><text:span text:style-name="T4">19 variáveis</text:span><text:span text:style-name="T3">. Através de um estudo das correlações das variáveis com o NPS, conseguimos selecionar um grupo de variáveis de interes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6" draw:style-name="gr2" draw:text-style-name="P3" draw:layer="layout" svg:width="4.921cm" svg:height="0.614cm" svg:x="1.378cm" svg:y="7.074cm">
          <text:p text:style-name="P2"><text:span text:style-name="T24">Pedi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6" draw:style-name="gr2" draw:text-style-name="P3" draw:layer="layout" svg:width="5.413cm" svg:height="3.27cm" svg:x="1.378cm" svg:y="7.926cm">
          <text:list text:style-name="L12">
            <text:list-item>
              <text:p text:style-name="P20"><text:span text:style-name="T25">order_id</text:span></text:p>
            </text:list-item>
            <text:list-item>
              <text:p text:style-name="P20"><text:span text:style-name="T25">order_value</text:span></text:p>
            </text:list-item>
            <text:list-item>
              <text:p text:style-name="P20"><text:span text:style-name="T25">items_quantity</text:span></text:p>
            </text:list-item>
            <text:list-item>
              <text:p text:style-name="P20"><text:span text:style-name="T25">payment_installment</text:span></text:p>
            </text:list-item>
            <text:list-item>
              <text:p text:style-name="P20"><text:span text:style-name="T25">discount_valu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6" draw:style-name="gr2" draw:text-style-name="P3" draw:layer="layout" svg:width="4.922cm" svg:height="0.614cm" svg:x="6.766cm" svg:y="7.074cm">
          <text:p text:style-name="P2"><text:span text:style-name="T24">Log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2" draw:text-style-name="P3" draw:layer="layout" svg:width="4.812cm" svg:height="2.827cm" svg:x="6.765cm" svg:y="7.926cm">
          <text:list text:style-name="L12">
            <text:list-item>
              <text:p text:style-name="P20"><text:span text:style-name="T25">delivery_time_days</text:span></text:p>
            </text:list-item>
            <text:list-item>
              <text:p text:style-name="P20"><text:span text:style-name="T25">delivery_delay_days</text:span></text:p>
            </text:list-item>
            <text:list-item>
              <text:p text:style-name="P20"><text:span text:style-name="T25">freight_value</text:span></text:p>
            </text:list-item>
            <text:list-item>
              <text:p text:style-name="P20"><text:span text:style-name="T25">delivery_attemp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6" draw:style-name="gr2" draw:text-style-name="P3" draw:layer="layout" svg:width="4.922cm" svg:height="0.614cm" svg:x="12.074cm" svg:y="7.074cm">
          <text:p text:style-name="P2"><text:span text:style-name="T24">Atend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6" draw:style-name="gr2" draw:text-style-name="P3" draw:layer="layout" svg:width="6.607cm" svg:height="3.27cm" svg:x="12.074cm" svg:y="7.926cm">
          <text:list text:style-name="L12">
            <text:list-item>
              <text:p text:style-name="P20"><text:span text:style-name="T25">customer_service_contacts</text:span></text:p>
            </text:list-item>
            <text:list-item>
              <text:p text:style-name="P20"><text:span text:style-name="T25">resolution_time_days</text:span></text:p>
            </text:list-item>
            <text:list-item>
              <text:p text:style-name="P20"><text:span text:style-name="T25">complaints_count</text:span></text:p>
            </text:list-item>
            <text:list-item>
              <text:p text:style-name="P20"><text:span text:style-name="T25">csat_internal_sco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6" draw:style-name="gr2" draw:text-style-name="P3" draw:layer="layout" svg:width="4.922cm" svg:height="0.614cm" svg:x="18.537cm" svg:y="7.08cm">
          <text:p text:style-name="P2"><text:span text:style-name="T24">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6" draw:style-name="gr2" draw:text-style-name="P3" draw:layer="layout" svg:width="5.946cm" svg:height="3.636cm" svg:x="18.537cm" svg:y="7.931cm">
          <text:list text:style-name="L12">
            <text:list-item>
              <text:p text:style-name="P20"><text:span text:style-name="T25">customer_id</text:span></text:p>
            </text:list-item>
            <text:list-item>
              <text:p text:style-name="P20"><text:span text:style-name="T25">customer_age</text:span></text:p>
            </text:list-item>
            <text:list-item>
              <text:p text:style-name="P20"><text:span text:style-name="T25">customer_region</text:span></text:p>
            </text:list-item>
            <text:list-item>
              <text:p text:style-name="P20"><text:span text:style-name="T25">customer_tenure_months</text:span></text:p>
            </text:list-item>
            <text:list-item>
              <text:p text:style-name="P20"><text:span text:style-name="T25">repeat_purchase_30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6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16" draw:style-name="gr1" draw:text-style-name="P1" draw:layer="layout" svg:width="1.048cm" svg:height="1.048cm" svg:x="1.378cm" svg:y="5.689cm">
          <draw:image xlink:href="Pictures/100002010000020000000200590C401C21F1886B.png" xlink:type="simple" xlink:show="embed" xlink:actuate="onLoad">
            <text:p/>
          </draw:image>
        </draw:frame>
        <draw:frame draw:name="Google Shape;120;p16" draw:style-name="gr1" draw:text-style-name="P1" draw:layer="layout" svg:width="1.048cm" svg:height="1.048cm" svg:x="6.765cm" svg:y="5.689cm">
          <draw:image xlink:href="Pictures/1000020100000200000002000E9D8076B40E08B4.png" xlink:type="simple" xlink:show="embed" xlink:actuate="onLoad">
            <text:p/>
          </draw:image>
        </draw:frame>
        <draw:frame draw:name="Google Shape;121;p16" draw:style-name="gr1" draw:text-style-name="P1" draw:layer="layout" svg:width="1.048cm" svg:height="1.048cm" svg:x="12.074cm" svg:y="5.689cm">
          <draw:image xlink:href="Pictures/1000020100000200000002001A1D1C771F58944B.png" xlink:type="simple" xlink:show="embed" xlink:actuate="onLoad">
            <text:p/>
          </draw:image>
        </draw:frame>
        <draw:frame draw:name="Google Shape;122;p16" draw:style-name="gr1" draw:text-style-name="P1" draw:layer="layout" svg:width="1.048cm" svg:height="1.048cm" svg:x="18.537cm" svg:y="5.691cm">
          <draw:image xlink:href="Pictures/100002010000020000000200CCE0A087542B6406.png" xlink:type="simple" xlink:show="embed" xlink:actuate="onLoad">
            <text:p/>
          </draw:image>
        </draw:frame>
        <presentation:notes draw:style-name="dp2">
          <draw:page-thumbnail draw:name="Google Shape;102;p3:notes" draw:style-name="gr6" draw:layer="layout" svg:width="15.239cm" svg:height="8.572cm" svg:x="1.905cm" svg:y="3.175cm" draw:page-number="3" presentation:class="page"/>
          <draw:frame draw:name="Google Shape;103;p3:notes" presentation:style-name="pr5" draw:text-style-name="P19" draw:layer="layout" svg:width="15.239cm" svg:height="10cm" svg:x="1.905cm" svg:y="12.224cm" presentation:class="notes" presentation:user-transformed="true">
            <draw:text-box>
              <text:p text:style-name="P21"><text:span text:style-name="T23">Nossa base tem 19 variáveis, sendo uma o próprio nps score e as outras divididas em quatro grupos: pedido, logística, atendimento e perfil do cliente. </text:span></text:p>
              <text:p text:style-name="P22"><text:span text:style-name="T26"/></text:p>
            </draw:text-box>
          </draw:frame>
          <draw:frame draw:name="Google Shape;104;p3:notes" presentation:style-name="pr6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Slide_20_3_20_master">
        <draw:custom-shape draw:name="Google Shape;128;p17" draw:style-name="gr2" draw:text-style-name="P3" draw:layer="layout" svg:width="15.072cm" svg:height="1.23cm" svg:x="1.378cm" svg:y="2.336cm">
          <text:p text:style-name="P2"><text:span text:style-name="T1">O que influenci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7" draw:style-name="gr2" draw:text-style-name="P3" draw:layer="layout" svg:width="22.643cm" svg:height="1.193cm" svg:x="1.378cm" svg:y="4.157cm">
          <text:p text:style-name="P4"><text:span text:style-name="T3">Mas apenas </text:span><text:span text:style-name="T4">6 variáveis</text:span><text:span text:style-name="T3"> influenciam o NPS do cli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7" draw:style-name="gr2" draw:text-style-name="P3" draw:layer="layout" svg:width="4.922cm" svg:height="0.614cm" svg:x="1.378cm" svg:y="7.074cm">
          <text:p text:style-name="P2"><text:span text:style-name="T24">Pedi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7" draw:style-name="gr2" draw:text-style-name="P3" draw:layer="layout" svg:width="5.413cm" svg:height="3.27cm" svg:x="1.378cm" svg:y="7.926cm">
          <text:list text:style-name="L13">
            <text:list-item>
              <text:p text:style-name="P20"><text:span text:style-name="T27">order_id</text:span></text:p>
            </text:list-item>
          </text:list>
          <text:list text:style-name="L12">
            <text:list-item>
              <text:p text:style-name="P20"><text:span text:style-name="T27">order_value</text:span></text:p>
            </text:list-item>
            <text:list-item>
              <text:p text:style-name="P20"><text:span text:style-name="T27">items_quantity</text:span></text:p>
            </text:list-item>
            <text:list-item>
              <text:p text:style-name="P20"><text:span text:style-name="T27">payment_installment</text:span></text:p>
            </text:list-item>
            <text:list-item>
              <text:p text:style-name="P20"><text:span text:style-name="T27">discount_valu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7" draw:style-name="gr2" draw:text-style-name="P3" draw:layer="layout" svg:width="4.922cm" svg:height="0.614cm" svg:x="6.766cm" svg:y="7.074cm">
          <text:p text:style-name="P2"><text:span text:style-name="T24">Log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7" draw:style-name="gr2" draw:text-style-name="P3" draw:layer="layout" svg:width="4.812cm" svg:height="2.827cm" svg:x="6.765cm" svg:y="7.926cm">
          <text:list text:style-name="L12">
            <text:list-item>
              <text:p text:style-name="P20"><text:span text:style-name="T27">delivery_time_days</text:span></text:p>
            </text:list-item>
            <text:list-item>
              <text:p text:style-name="P20"><text:span text:style-name="T28">delivery_delay_days</text:span></text:p>
            </text:list-item>
            <text:list-item>
              <text:p text:style-name="P20"><text:span text:style-name="T27">freight_value</text:span></text:p>
            </text:list-item>
            <text:list-item>
              <text:p text:style-name="P20"><text:span text:style-name="T27">delivery_attemp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7" draw:style-name="gr2" draw:text-style-name="P3" draw:layer="layout" svg:width="4.922cm" svg:height="0.614cm" svg:x="12.074cm" svg:y="7.074cm">
          <text:p text:style-name="P2"><text:span text:style-name="T24">Atend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7" draw:style-name="gr2" draw:text-style-name="P3" draw:layer="layout" svg:width="6.607cm" svg:height="3.27cm" svg:x="12.074cm" svg:y="7.926cm">
          <text:list text:style-name="L12">
            <text:list-item>
              <text:p text:style-name="P20"><text:span text:style-name="T28">customer_service_contacts</text:span></text:p>
            </text:list-item>
            <text:list-item>
              <text:p text:style-name="P20"><text:span text:style-name="T28">resolution_time_days</text:span></text:p>
            </text:list-item>
            <text:list-item>
              <text:p text:style-name="P20"><text:span text:style-name="T28">complaints_count</text:span></text:p>
            </text:list-item>
            <text:list-item>
              <text:p text:style-name="P20"><text:span text:style-name="T28">csat_internal_sco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7" draw:style-name="gr16" draw:text-style-name="P23" draw:layer="layout" svg:width="22.643cm" svg:height="1.646cm" svg:x="1.378cm" svg:y="11.568cm">
          <text:p text:style-name="P11"/>
          <draw:enhanced-geometry draw:mirror-horizontal="false" draw:mirror-vertical="false" draw:text-areas="?f5 ?f5 ?f6 ?f7" svg:viewBox="0 0 0 0" draw:type="ooxml-roundRect" draw:modifiers="1004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7;p17" draw:style-name="gr1" draw:text-style-name="P1" draw:layer="layout" svg:width="0.491cm" svg:height="0.393cm" svg:x="1.772cm" svg:y="12.184cm">
          <draw:image xlink:href="Pictures/100002010000004A0000003C8105D9AC4669731B.png" xlink:type="simple" xlink:show="embed" xlink:actuate="onLoad">
            <text:p/>
          </draw:image>
        </draw:frame>
        <draw:custom-shape draw:name="Google Shape;138;p17" draw:style-name="gr4" draw:text-style-name="P3" draw:layer="layout" svg:width="20.969cm" svg:height="0.603cm" svg:x="2.658cm" svg:y="12.06cm">
          <text:p text:style-name="P4"><text:span text:style-name="T29">Variável-alvo: </text:span><text:span text:style-name="T30">nps_score</text:span><text:span text:style-name="T29"> | Dataset limpo e validado — sem nulos, duplicatas ou valores fora do intervalo 0–10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7" draw:style-name="gr2" draw:text-style-name="P3" draw:layer="layout" svg:width="4.922cm" svg:height="0.614cm" svg:x="18.537cm" svg:y="7.08cm">
          <text:p text:style-name="P2"><text:span text:style-name="T24">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7" draw:style-name="gr2" draw:text-style-name="P3" draw:layer="layout" svg:width="5.946cm" svg:height="3.636cm" svg:x="18.537cm" svg:y="7.931cm">
          <text:list text:style-name="L12">
            <text:list-item>
              <text:p text:style-name="P20"><text:span text:style-name="T27">customer_id</text:span></text:p>
            </text:list-item>
            <text:list-item>
              <text:p text:style-name="P20"><text:span text:style-name="T27">customer_age</text:span></text:p>
            </text:list-item>
            <text:list-item>
              <text:p text:style-name="P20"><text:span text:style-name="T27">customer_region</text:span></text:p>
            </text:list-item>
            <text:list-item>
              <text:p text:style-name="P20"><text:span text:style-name="T27">customer_tenure_months</text:span></text:p>
            </text:list-item>
            <text:list-item>
              <text:p text:style-name="P20"><text:span text:style-name="T28">repeat_purchase_30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7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17" draw:style-name="gr1" draw:text-style-name="P1" draw:layer="layout" svg:width="1.048cm" svg:height="1.048cm" svg:x="1.378cm" svg:y="5.689cm">
          <draw:image xlink:href="Pictures/100002010000020000000200590C401C21F1886B.png" xlink:type="simple" xlink:show="embed" xlink:actuate="onLoad">
            <text:p/>
          </draw:image>
        </draw:frame>
        <draw:frame draw:name="Google Shape;143;p17" draw:style-name="gr1" draw:text-style-name="P1" draw:layer="layout" svg:width="1.048cm" svg:height="1.048cm" svg:x="6.765cm" svg:y="5.689cm">
          <draw:image xlink:href="Pictures/1000020100000200000002000E9D8076B40E08B4.png" xlink:type="simple" xlink:show="embed" xlink:actuate="onLoad">
            <text:p/>
          </draw:image>
        </draw:frame>
        <draw:frame draw:name="Google Shape;144;p17" draw:style-name="gr1" draw:text-style-name="P1" draw:layer="layout" svg:width="1.048cm" svg:height="1.048cm" svg:x="12.074cm" svg:y="5.689cm">
          <draw:image xlink:href="Pictures/1000020100000200000002001A1D1C771F58944B.png" xlink:type="simple" xlink:show="embed" xlink:actuate="onLoad">
            <text:p/>
          </draw:image>
        </draw:frame>
        <draw:frame draw:name="Google Shape;145;p17" draw:style-name="gr1" draw:text-style-name="P1" draw:layer="layout" svg:width="1.048cm" svg:height="1.048cm" svg:x="18.537cm" svg:y="5.691cm">
          <draw:image xlink:href="Pictures/100002010000020000000200CCE0A087542B6406.png" xlink:type="simple" xlink:show="embed" xlink:actuate="onLoad">
            <text:p/>
          </draw:image>
        </draw:frame>
        <draw:custom-shape draw:name="Google Shape;146;p17" draw:style-name="gr15" draw:text-style-name="P3" draw:layer="layout" svg:width="2.895cm" svg:height="0.707cm" svg:x="1.378cm" svg:y="1.499cm">
          <text:p text:style-name="P11"/>
          <draw:enhanced-geometry draw:mirror-horizontal="false" draw:mirror-vertical="false" draw:text-areas="?f5 ?f5 ?f6 ?f7" svg:viewBox="0 0 0 0" draw:type="ooxml-roundRect" draw:modifiers="18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7;p17" draw:style-name="gr2" draw:text-style-name="P3" draw:layer="layout" svg:width="1.018cm" svg:height="0.472cm" svg:x="2.316cm" svg:y="1.678cm">
          <text:p text:style-name="P6"><text:span text:style-name="T22">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3e7a2f80275_0_55:notes" draw:style-name="gr6" draw:layer="layout" svg:width="15.239cm" svg:height="8.572cm" svg:x="1.905cm" svg:y="3.175cm" draw:page-number="4" presentation:class="page"/>
          <draw:frame draw:name="Google Shape;125;g3e7a2f80275_0_55:notes" presentation:style-name="pr5" draw:text-style-name="P19" draw:layer="layout" svg:width="15.239cm" svg:height="10.001cm" svg:x="1.905cm" svg:y="12.224cm" presentation:class="notes" presentation:user-transformed="true">
            <draw:text-box>
              <text:p text:style-name="P21"><text:span text:style-name="T23">Ao estudar a correlação de cada uma com o NPS, descobrimos que apenas 6 têm influência real. Notamos já algo interessante, características dos pedidos não possuem relação com o NPS, assim como características do cliente também não, exceto pela recompra nos últimos 30 dias. </text:span></text:p>
              <text:p text:style-name="P22"><text:span text:style-name="T26"/></text:p>
            </draw:text-box>
          </draw:frame>
          <draw:frame draw:name="Google Shape;126;g3e7a2f80275_0_55:notes" presentation:style-name="pr6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Slide_20_3_20_master">
        <draw:custom-shape draw:name="Google Shape;153;p18" draw:style-name="gr2" draw:text-style-name="P3" draw:layer="layout" svg:width="15.072cm" svg:height="1.23cm" svg:x="1.378cm" svg:y="2.336cm">
          <text:p text:style-name="P2"><text:span text:style-name="T1">O que queremos respond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8" draw:style-name="gr2" draw:text-style-name="P3" draw:layer="layout" svg:width="4.922cm" svg:height="0.614cm" svg:x="9.074cm" svg:y="5.438cm">
          <text:p text:style-name="P2"><text:span text:style-name="T31">Atraso nos dias de entreg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8" draw:style-name="gr2" draw:text-style-name="P3" draw:layer="layout" svg:width="4.812cm" svg:height="0.603cm" svg:x="2.658cm" svg:y="5.509cm">
          <text:list text:style-name="L12">
            <text:list-item>
              <text:p text:style-name="P20"><text:span text:style-name="T28">delivery_delay_days</text:span></text:p>
            </text:list-item>
          </text:list>
          <text:p text:style-name="P4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8" draw:style-name="gr2" draw:text-style-name="P3" draw:layer="layout" svg:width="7.376cm" svg:height="2.712cm" svg:x="9.074cm" svg:y="6.457cm">
          <text:p text:style-name="P4"><text:span text:style-name="T31">Contatos do cliente ao CS</text:span></text:p>
          <text:p text:style-name="P4"><text:span text:style-name="T31">Dias de resolução</text:span></text:p>
          <text:p text:style-name="P4"><text:span text:style-name="T31">Quantidade de reclamações</text:span></text:p>
          <text:p text:style-name="P4"><text:span text:style-name="T31">Índice de satisfação do 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8" draw:style-name="gr2" draw:text-style-name="P3" draw:layer="layout" svg:width="6.607cm" svg:height="2.712cm" svg:x="2.647cm" svg:y="6.457cm">
          <text:list text:style-name="L12">
            <text:list-item>
              <text:p text:style-name="P20"><text:span text:style-name="T28">customer_service_contacts</text:span></text:p>
            </text:list-item>
            <text:list-item>
              <text:p text:style-name="P20"><text:span text:style-name="T28">resolution_time_days</text:span></text:p>
            </text:list-item>
            <text:list-item>
              <text:p text:style-name="P20"><text:span text:style-name="T28">complaints_count</text:span></text:p>
            </text:list-item>
            <text:list-item>
              <text:p text:style-name="P20"><text:span text:style-name="T28">csat_internal_sco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8" draw:style-name="gr2" draw:text-style-name="P3" draw:layer="layout" svg:width="4.922cm" svg:height="0.614cm" svg:x="9.074cm" svg:y="9.49cm">
          <text:p text:style-name="P2"><text:span text:style-name="T31">Recompra em até 30 d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8" draw:style-name="gr2" draw:text-style-name="P3" draw:layer="layout" svg:width="5.946cm" svg:height="0.707cm" svg:x="2.647cm" svg:y="9.443cm">
          <text:list text:style-name="L12">
            <text:list-item>
              <text:p text:style-name="P20"><text:span text:style-name="T28">repeat_purchase_30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8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8" draw:style-name="gr17" draw:text-style-name="P5" draw:layer="layout" svg:width="22.643cm" svg:height="2.712cm" svg:x="1.378cm" svg:y="11.098cm">
          <text:p text:style-name="P4"><text:span text:style-name="T4">Pergunta norteadora</text:span></text:p>
          <text:p text:style-name="P4"><text:span text:style-name="T3">Quais fatores, antes do fim do ciclo de compra, mais influenciam o NPS do cliente, de forma a entender quais clientes são detratores e quais são não detratores?</text:span></text:p>
          <draw:enhanced-geometry draw:mirror-horizontal="false" draw:mirror-vertical="false" draw:text-areas="?f5 ?f5 ?f6 ?f7" svg:viewBox="0 0 0 0" draw:type="ooxml-roundRect" draw:modifiers="61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62;p18" draw:style-name="gr1" draw:text-style-name="P1" draw:layer="layout" svg:width="1.048cm" svg:height="1.048cm" svg:x="1.248cm" svg:y="5.227cm">
          <draw:image xlink:href="Pictures/1000020100000200000002000E9D8076B40E08B4.png" xlink:type="simple" xlink:show="embed" xlink:actuate="onLoad">
            <text:p/>
          </draw:image>
        </draw:frame>
        <draw:frame draw:name="Google Shape;163;p18" draw:style-name="gr1" draw:text-style-name="P1" draw:layer="layout" svg:width="1.048cm" svg:height="1.048cm" svg:x="1.248cm" svg:y="6.275cm">
          <draw:image xlink:href="Pictures/1000020100000200000002001A1D1C771F58944B.png" xlink:type="simple" xlink:show="embed" xlink:actuate="onLoad">
            <text:p/>
          </draw:image>
        </draw:frame>
        <draw:frame draw:name="Google Shape;164;p18" draw:style-name="gr1" draw:text-style-name="P1" draw:layer="layout" svg:width="1.048cm" svg:height="1.048cm" svg:x="1.248cm" svg:y="9.17cm">
          <draw:image xlink:href="Pictures/100002010000020000000200CCE0A087542B6406.png" xlink:type="simple" xlink:show="embed" xlink:actuate="onLoad">
            <text:p/>
          </draw:image>
        </draw:frame>
        <draw:custom-shape draw:name="Google Shape;165;p18" draw:style-name="gr15" draw:text-style-name="P3" draw:layer="layout" svg:width="2.895cm" svg:height="0.707cm" svg:x="1.378cm" svg:y="1.499cm">
          <text:p text:style-name="P11"/>
          <draw:enhanced-geometry draw:mirror-horizontal="false" draw:mirror-vertical="false" draw:text-areas="?f5 ?f5 ?f6 ?f7" svg:viewBox="0 0 0 0" draw:type="ooxml-roundRect" draw:modifiers="18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6;p18" draw:style-name="gr2" draw:text-style-name="P3" draw:layer="layout" svg:width="1.666cm" svg:height="0.472cm" svg:x="1.995cm" svg:y="1.678cm">
          <text:p text:style-name="P6"><text:span text:style-name="T22">PERGUN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3e7a2f80275_1_3:notes" draw:style-name="gr6" draw:layer="layout" svg:width="15.239cm" svg:height="8.572cm" svg:x="1.905cm" svg:y="3.175cm" draw:page-number="5" presentation:class="page"/>
          <draw:frame draw:name="Google Shape;150;g3e7a2f80275_1_3:notes" presentation:style-name="pr5" draw:text-style-name="P19" draw:layer="layout" svg:width="15.239cm" svg:height="10.001cm" svg:x="1.905cm" svg:y="12.224cm" presentation:class="notes" presentation:user-transformed="true">
            <draw:text-box>
              <text:p text:style-name="P11"><text:span text:style-name="T26">O problema que guiou a analise é: </text:span><text:span text:style-name="T3">Quais fatores, antes do fim do ciclo de compra, mais influenciam o NPS do cliente, de forma a entender quais clientes são detratores e quais são não detratores?</text:span></text:p>
              <text:p text:style-name="P11"><text:span text:style-name="T3"/></text:p>
              <text:p text:style-name="P11"><text:span text:style-name="T3">Dado isso, com as 6 variáveis que influenciam o NPS temos algumas que não podem ser usadas pois estarão disponíveis apenas no fim da jornada do cliente, o dado de recompra, que trás forte correlação de clientes promotores, e o resolution time days, que está disponível apenas após a solução da dor do cliente. </text:span></text:p>
            </draw:text-box>
          </draw:frame>
          <draw:frame draw:name="Google Shape;151;g3e7a2f80275_1_3:notes" presentation:style-name="pr6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Slide_20_5_20_master">
        <draw:custom-shape draw:name="Google Shape;172;p19" draw:style-name="gr15" draw:text-style-name="P3" draw:layer="layout" svg:width="2.895cm" svg:height="0.707cm" svg:x="1.378cm" svg:y="1.47cm">
          <text:p text:style-name="P11"/>
          <draw:enhanced-geometry draw:mirror-horizontal="false" draw:mirror-vertical="false" draw:text-areas="?f5 ?f5 ?f6 ?f7" svg:viewBox="0 0 0 0" draw:type="ooxml-roundRect" draw:modifiers="18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3;p19" draw:style-name="gr2" draw:text-style-name="P3" draw:layer="layout" svg:width="1.989cm" svg:height="0.472cm" svg:x="1.852cm" svg:y="1.628cm">
          <text:p text:style-name="P6"><text:span text:style-name="T22">CORREL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9" draw:style-name="gr2" draw:text-style-name="P3" draw:layer="layout" svg:width="13.035cm" svg:height="1.23cm" svg:x="1.378cm" svg:y="2.336cm">
          <text:p text:style-name="P2"><text:span text:style-name="T1">O que a correlação revelou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19" draw:style-name="gr1" draw:text-style-name="P1" draw:layer="layout" svg:width="18.031cm" svg:height="8.869cm" svg:x="3.684cm" svg:y="4.37cm">
          <draw:image xlink:href="Pictures/10000201000003D8000001E4D2ADD412A0D68F7D.png" xlink:type="simple" xlink:show="embed" xlink:actuate="onLoad">
            <text:p/>
          </draw:image>
        </draw:frame>
        <draw:custom-shape draw:name="Google Shape;176;p19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p5:notes" draw:style-name="gr6" draw:layer="layout" svg:width="15.239cm" svg:height="8.572cm" svg:x="1.905cm" svg:y="3.175cm" draw:page-number="6" presentation:class="page"/>
          <draw:frame draw:name="Google Shape;169;p5:notes" presentation:style-name="pr7" draw:text-style-name="P19" draw:layer="layout" svg:width="15.239cm" svg:height="10cm" svg:x="1.905cm" svg:y="12.224cm" presentation:class="notes" presentation:user-transformed="true">
            <draw:text-box>
              <text:p text:style-name="P21"><text:span text:style-name="T23">O CSAT é um indicador importante do NPS, pois mede a satisfação do cliente, mas não entra no modelo e estará disponível apenas ao fim da jornada. Assim, temos 3 variáveis operacionais disponíveis, sendo atraso na entrega, o número de reclamações e o contatos com o suporte. </text:span></text:p>
              <text:p text:style-name="P24"><text:span text:style-name="T32"/></text:p>
              <text:p text:style-name="P4"><text:span text:style-name="T32"/></text:p>
              <text:p text:style-name="P4"><text:span text:style-name="T3"/></text:p>
              <text:p text:style-name="P2"><text:span text:style-name="T32"/></text:p>
              <text:p text:style-name="P11"><text:span text:style-name="T26"/></text:p>
            </draw:text-box>
          </draw:frame>
          <draw:frame draw:name="Google Shape;170;p5:notes" presentation:style-name="pr8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Slide_20_10_20_master">
        <draw:custom-shape draw:name="Google Shape;182;p20" draw:style-name="gr15" draw:text-style-name="P3" draw:layer="layout" svg:width="2.895cm" svg:height="0.707cm" svg:x="1.378cm" svg:y="1.471cm">
          <text:p text:style-name="P11"><text:span text:style-name="T22"/></text:p>
          <draw:enhanced-geometry draw:mirror-horizontal="false" draw:mirror-vertical="false" draw:text-areas="?f5 ?f5 ?f6 ?f7" svg:viewBox="0 0 0 0" draw:type="ooxml-roundRect" draw:modifiers="190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3;p20" draw:style-name="gr2" draw:text-style-name="P3" draw:layer="layout" svg:width="2.069cm" svg:height="0.318cm" svg:x="1.791cm" svg:y="1.676cm">
          <text:p text:style-name="P25"><text:span text:style-name="T22">INSIGHTS E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0" draw:style-name="gr2" draw:text-style-name="P3" draw:layer="layout" svg:width="15.734cm" svg:height="0.983cm" svg:x="1.378cm" svg:y="2.561cm">
          <text:p text:style-name="P2"><text:span text:style-name="T33">Principais Insigh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0" draw:style-name="gr18" draw:text-style-name="P7" draw:layer="layout" svg:width="7.379cm" svg:height="2.246cm" svg:x="1.339cm" svg:y="4.37cm">
          <text:p text:style-name="P11"/>
          <draw:enhanced-geometry draw:mirror-horizontal="false" draw:mirror-vertical="false" draw:text-areas="?f5 ?f5 ?f6 ?f7" svg:viewBox="0 0 0 0" draw:type="ooxml-roundRect" draw:modifiers="1071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6;p20" draw:style-name="gr2" draw:text-style-name="P3" draw:layer="layout" svg:width="6.253cm" svg:height="0.492cm" svg:x="1.813cm" svg:y="4.855cm">
          <text:p text:style-name="P26"><text:span text:style-name="T31">Perfil de 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0" draw:style-name="gr2" draw:text-style-name="P3" draw:layer="layout" svg:width="6.551cm" svg:height="0.424cm" svg:x="1.813cm" svg:y="5.498cm">
          <text:p text:style-name="P27"><text:span text:style-name="T34">O perfil do cliente não tem relação ou influência no NP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0" draw:style-name="gr18" draw:text-style-name="P7" draw:layer="layout" svg:width="7.379cm" svg:height="2.246cm" svg:x="8.971cm" svg:y="4.37cm">
          <text:p text:style-name="P11"/>
          <draw:enhanced-geometry draw:mirror-horizontal="false" draw:mirror-vertical="false" draw:text-areas="?f5 ?f5 ?f6 ?f7" svg:viewBox="0 0 0 0" draw:type="ooxml-roundRect" draw:modifiers="1071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9;p20" draw:style-name="gr2" draw:text-style-name="P3" draw:layer="layout" svg:width="4.958cm" svg:height="0.492cm" svg:x="9.445cm" svg:y="4.855cm">
          <text:p text:style-name="P26"><text:span text:style-name="T31">Características do pedi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0" draw:style-name="gr2" draw:text-style-name="P3" draw:layer="layout" svg:width="6.551cm" svg:height="0.424cm" svg:x="9.445cm" svg:y="5.498cm">
          <text:p text:style-name="P27"><text:span text:style-name="T34">As características do pedido não tem influência no NP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0" draw:style-name="gr18" draw:text-style-name="P7" draw:layer="layout" svg:width="7.379cm" svg:height="2.246cm" svg:x="16.603cm" svg:y="4.37cm">
          <text:p text:style-name="P11"/>
          <draw:enhanced-geometry draw:mirror-horizontal="false" draw:mirror-vertical="false" draw:text-areas="?f5 ?f5 ?f6 ?f7" svg:viewBox="0 0 0 0" draw:type="ooxml-roundRect" draw:modifiers="1071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2;p20" draw:style-name="gr19" draw:text-style-name="P3" draw:layer="layout" svg:width="4.774cm" svg:height="0.492cm" svg:x="16.931cm" svg:y="4.881cm">
          <text:p text:style-name="P26"><text:span text:style-name="T31">Base assimétr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0" draw:style-name="gr2" draw:text-style-name="P3" draw:layer="layout" svg:width="6.551cm" svg:height="0.424cm" svg:x="17.077cm" svg:y="5.498cm">
          <text:p text:style-name="P27"><text:span text:style-name="T34">Há uma quantidade desproporcional de detratores na ba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0" draw:style-name="gr18" draw:text-style-name="P7" draw:layer="layout" svg:width="7.379cm" svg:height="2.216cm" svg:x="1.339cm" svg:y="7.623cm">
          <text:p text:style-name="P11"/>
          <draw:enhanced-geometry draw:mirror-horizontal="false" draw:mirror-vertical="false" draw:text-areas="?f5 ?f5 ?f6 ?f7" svg:viewBox="0 0 0 0" draw:type="ooxml-roundRect" draw:modifiers="859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5;p20" draw:style-name="gr2" draw:text-style-name="P3" draw:layer="layout" svg:width="4.537cm" svg:height="0.492cm" svg:x="1.813cm" svg:y="7.978cm">
          <text:p text:style-name="P26"><text:span text:style-name="T31">Log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0" draw:style-name="gr2" draw:text-style-name="P3" draw:layer="layout" svg:width="6.551cm" svg:height="0.424cm" svg:x="1.813cm" svg:y="8.621cm">
          <text:p text:style-name="P27"><text:span text:style-name="T34">Grande parte das características de logística não influenciam, porém o atraso é decisiv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0" draw:style-name="gr18" draw:text-style-name="P7" draw:layer="layout" svg:width="7.379cm" svg:height="2.216cm" svg:x="8.971cm" svg:y="7.623cm">
          <text:p text:style-name="P11"/>
          <draw:enhanced-geometry draw:mirror-horizontal="false" draw:mirror-vertical="false" draw:text-areas="?f5 ?f5 ?f6 ?f7" svg:viewBox="0 0 0 0" draw:type="ooxml-roundRect" draw:modifiers="859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8;p20" draw:style-name="gr2" draw:text-style-name="P3" draw:layer="layout" svg:width="3.937cm" svg:height="0.492cm" svg:x="9.445cm" svg:y="7.978cm">
          <text:p text:style-name="P26"><text:span text:style-name="T31">Atend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0" draw:style-name="gr2" draw:text-style-name="P3" draw:layer="layout" svg:width="6.551cm" svg:height="0.862cm" svg:x="9.445cm" svg:y="8.621cm">
          <text:p text:style-name="P27"><text:span text:style-name="T34">Grupo de variáveis com maior correlação com o NPS, com destaque para o complaint coun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0" draw:style-name="gr18" draw:text-style-name="P7" draw:layer="layout" svg:width="7.379cm" svg:height="2.176cm" svg:x="16.642cm" svg:y="7.623cm">
          <text:p text:style-name="P11"/>
          <draw:enhanced-geometry draw:mirror-horizontal="false" draw:mirror-vertical="false" draw:text-areas="?f5 ?f5 ?f6 ?f7" svg:viewBox="0 0 0 0" draw:type="ooxml-roundRect" draw:modifiers="1071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1;p20" draw:style-name="gr2" draw:text-style-name="P3" draw:layer="layout" svg:width="4.631cm" svg:height="0.492cm" svg:x="17.116cm" svg:y="8.007cm">
          <text:p text:style-name="P26"><text:span text:style-name="T31">Modelos e Cla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0" draw:style-name="gr2" draw:text-style-name="P3" draw:layer="layout" svg:width="6.551cm" svg:height="0.849cm" svg:x="17.116cm" svg:y="8.651cm">
          <text:p text:style-name="P27"><text:span text:style-name="T34">Devido à natureza assimétrica da base, sugere-se duas classes para a análise: Detrator e Não Detra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0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8;g3e7a2f80275_1_218:notes" draw:style-name="gr6" draw:layer="layout" svg:width="15.239cm" svg:height="8.572cm" svg:x="1.905cm" svg:y="3.175cm" draw:page-number="7" presentation:class="page"/>
          <draw:frame draw:name="Google Shape;179;g3e7a2f80275_1_218:notes" presentation:style-name="pr9" draw:text-style-name="P19" draw:layer="layout" svg:width="15.239cm" svg:height="10.001cm" svg:x="1.905cm" svg:y="12.224cm" presentation:class="notes" presentation:user-transformed="true">
            <draw:text-box>
              <text:p text:style-name="P11"><text:span text:style-name="T26">Dado os dois fatores abordados anteriormente, pode-se retirar os seguintes insights da base de dados:</text:span></text:p>
              <text:p text:style-name="P11"><text:span text:style-name="T26"/></text:p>
              <text:p text:style-name="P11"><text:span text:style-name="T26">O perfil de cliente e o perfil de compra não são fatores determinantes, o que nos dá poder de ação.</text:span></text:p>
              <text:p text:style-name="P11"><text:span text:style-name="T26"/></text:p>
              <text:p text:style-name="P11"><text:span text:style-name="T26"/></text:p>
              <text:p text:style-name="P11"><text:span text:style-name="T26">Também temos que o grande ofensor do NPS é a logística e o atendimento, fatores operacionais no controle da empresa. </text:span></text:p>
              <text:p text:style-name="P11"><text:span text:style-name="T26"/></text:p>
              <text:p text:style-name="P11"><text:span text:style-name="T26">A base de dados é fortemente assimetrica, devido à alta quantidade de detratores, o desenvolvimento de modelos visará modelos de classificação, e inicialmente classificação binária, risco de ser detrator ou não detrator. </text:span></text:p>
              <text:p text:style-name="P11"><text:span text:style-name="T26"><text:s/></text:span></text:p>
            </draw:text-box>
          </draw:frame>
          <draw:frame draw:name="Google Shape;180;g3e7a2f80275_1_218:notes" presentation:style-name="pr10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Slide_20_1_20_master">
        <draw:custom-shape draw:name="Google Shape;209;p21" draw:style-name="gr2" draw:text-style-name="P3" draw:layer="layout" svg:width="18.613cm" svg:height="1.23cm" svg:x="1.378cm" svg:y="2.34cm">
          <text:p text:style-name="P2"><text:span text:style-name="T1">Insights da Logística e Atend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1" draw:style-name="gr7" draw:text-style-name="P5" draw:layer="layout" svg:width="11.124cm" svg:height="5.012cm" svg:x="1.378cm" svg:y="4.37cm">
          <text:p text:style-name="P11"/>
          <draw:enhanced-geometry draw:mirror-horizontal="false" draw:mirror-vertical="false" draw:text-areas="?f5 ?f5 ?f6 ?f7" svg:viewBox="0 0 0 0" draw:type="ooxml-roundRect" draw:modifiers="33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11;p21" draw:style-name="gr1" draw:text-style-name="P1" draw:layer="layout" svg:width="1.18cm" svg:height="1.18cm" svg:x="1.785cm" svg:y="4.777cm">
          <draw:image xlink:href="Pictures/10000201000000B2000000B207A2FB3995EDF1A9.png" xlink:type="simple" xlink:show="embed" xlink:actuate="onLoad">
            <text:p/>
          </draw:image>
        </draw:frame>
        <draw:frame draw:name="Google Shape;212;p21" draw:style-name="gr1" draw:text-style-name="P1" draw:layer="layout" svg:width="0.53cm" svg:height="0.53cm" svg:x="2.11cm" svg:y="5.342cm">
          <draw:image xlink:href="Pictures/1000020100000050000000502016C7B55DF35858.png" xlink:type="simple" xlink:show="embed" xlink:actuate="onLoad">
            <text:p/>
          </draw:image>
        </draw:frame>
        <draw:custom-shape draw:name="Google Shape;213;p21" draw:style-name="gr2" draw:text-style-name="P3" draw:layer="layout" svg:width="4.922cm" svg:height="0.614cm" svg:x="3.218cm" svg:y="5.424cm">
          <text:p text:style-name="P2"><text:span text:style-name="T35">Impacto do Atra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1" draw:style-name="gr2" draw:text-style-name="P3" draw:layer="layout" svg:width="10.31cm" svg:height="3.203cm" svg:x="1.785cm" svg:y="6.178cm">
          <text:list text:style-name="L25">
            <text:list-item>
              <text:p text:style-name="P28"><text:span text:style-name="T36">Sem atraso, temos um perfil de cliente neutro. </text:span></text:p>
            </text:list-item>
            <text:list-item>
              <text:p text:style-name="P28"><text:span text:style-name="T36">Promotores acabam após dois dias de atraso. </text:span></text:p>
            </text:list-item>
            <text:list-item>
              <text:p text:style-name="P28"><text:span text:style-name="T36">O cliente torna-se detrator após 4 dias de atraso. </text:span></text:p>
            </text:list-item>
          </text:list>
          <text:p text:style-name="P27"><text:span text:style-name="T37"/></text:p>
          <text:p text:style-name="P1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1" draw:style-name="gr7" draw:text-style-name="P5" draw:layer="layout" svg:width="11.124cm" svg:height="5.012cm" svg:x="12.897cm" svg:y="4.37cm">
          <text:p text:style-name="P11"/>
          <draw:enhanced-geometry draw:mirror-horizontal="false" draw:mirror-vertical="false" draw:text-areas="?f5 ?f5 ?f6 ?f7" svg:viewBox="0 0 0 0" draw:type="ooxml-roundRect" draw:modifiers="33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16;p21" draw:style-name="gr1" draw:text-style-name="P1" draw:layer="layout" svg:width="1.18cm" svg:height="1.18cm" svg:x="13.304cm" svg:y="4.777cm">
          <draw:image xlink:href="Pictures/10000201000000B2000000B201C8B35C7E53E143.png" xlink:type="simple" xlink:show="embed" xlink:actuate="onLoad">
            <text:p/>
          </draw:image>
        </draw:frame>
        <draw:frame draw:name="Google Shape;217;p21" draw:style-name="gr1" draw:text-style-name="P1" draw:layer="layout" svg:width="0.53cm" svg:height="0.53cm" svg:x="13.629cm" svg:y="5.342cm">
          <draw:image xlink:href="Pictures/100002010000005000000050845466DFA09C18FA.png" xlink:type="simple" xlink:show="embed" xlink:actuate="onLoad">
            <text:p/>
          </draw:image>
        </draw:frame>
        <draw:custom-shape draw:name="Google Shape;218;p21" draw:style-name="gr2" draw:text-style-name="P3" draw:layer="layout" svg:width="6.283cm" svg:height="0.614cm" svg:x="14.737cm" svg:y="5.424cm">
          <text:p text:style-name="P2"><text:span text:style-name="T35">Impacto do Atend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1" draw:style-name="gr2" draw:text-style-name="P3" draw:layer="layout" svg:width="10.31cm" svg:height="3.016cm" svg:x="13.304cm" svg:y="6.178cm">
          <text:list text:style-name="L25">
            <text:list-item>
              <text:p text:style-name="P28"><text:span text:style-name="T36">De 0 a 2 reclamações, o perfil do cliente é neutro.</text:span></text:p>
            </text:list-item>
            <text:list-item>
              <text:p text:style-name="P28"><text:span text:style-name="T36">Promotores resistem até 4 reclamações.</text:span></text:p>
            </text:list-item>
            <text:list-item>
              <text:p text:style-name="P28"><text:span text:style-name="T36">Após 6 reclamações, o perfil do cliente é detrator. </text:span></text:p>
            </text:list-item>
          </text:list>
          <text:p text:style-name="P1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1" draw:style-name="gr7" draw:text-style-name="P5" draw:layer="layout" svg:width="22.643cm" svg:height="2.707cm" svg:x="1.378cm" svg:y="9.825cm">
          <text:p text:style-name="P11"/>
          <draw:enhanced-geometry draw:mirror-horizontal="false" draw:mirror-vertical="false" draw:text-areas="?f5 ?f5 ?f6 ?f7" svg:viewBox="0 0 0 0" draw:type="ooxml-roundRect" draw:modifiers="1012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1;p21" draw:style-name="gr2" draw:text-style-name="P3" draw:layer="layout" svg:width="21.517cm" svg:height="1.884cm" svg:x="2.11cm" svg:y="10.317cm">
          <text:p text:style-name="P4"><text:span text:style-name="T29">Analisando-se os fatores em conjunto, entendemos que</text:span><text:span text:style-name="T39"> clientes podem tolerar atraso</text:span><text:span text:style-name="T29">, </text:span><text:span text:style-name="T39">desde que com resolução assertiva.</text:span><text:span text:style-name="T29"> Clientes com até </text:span><text:span text:style-name="T39">4 dias de atraso</text:span><text:span text:style-name="T29"> e no máximo </text:span><text:span text:style-name="T39">3 reclamações</text:span><text:span text:style-name="T29"> ficam na zona neutra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1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1" draw:style-name="gr15" draw:text-style-name="P3" draw:layer="layout" svg:width="2.895cm" svg:height="0.707cm" svg:x="1.378cm" svg:y="1.471cm">
          <text:p text:style-name="P11"><text:span text:style-name="T22"/></text:p>
          <draw:enhanced-geometry draw:mirror-horizontal="false" draw:mirror-vertical="false" draw:text-areas="?f5 ?f5 ?f6 ?f7" svg:viewBox="0 0 0 0" draw:type="ooxml-roundRect" draw:modifiers="190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4;p21" draw:style-name="gr2" draw:text-style-name="P3" draw:layer="layout" svg:width="2.069cm" svg:height="0.318cm" svg:x="1.988cm" svg:y="1.666cm">
          <text:p text:style-name="P25"><text:span text:style-name="T22">O 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5;g3e7a2f80275_1_312:notes" draw:style-name="gr6" draw:layer="layout" svg:width="15.239cm" svg:height="8.572cm" svg:x="1.905cm" svg:y="3.175cm" draw:page-number="8" presentation:class="page"/>
          <draw:frame draw:name="Google Shape;206;g3e7a2f80275_1_312:notes" presentation:style-name="pr11" draw:text-style-name="P19" draw:layer="layout" svg:width="15.239cm" svg:height="10.001cm" svg:x="1.905cm" svg:y="12.224cm" presentation:class="notes" presentation:user-transformed="true">
            <draw:text-box>
              <text:p text:style-name="P11"><text:span text:style-name="T26">Com os dois fatores que mais afetam em mente, analisamos quais os clientes com o menor NPS e quais os clientes com o maior NPS. Notamos que o atraso é um fator que rapidamente leva o cliente a ser detrator, clientes com 4 dias ou mais de atraso sempre serão detratores. </text:span></text:p>
              <text:p text:style-name="P11"><text:span text:style-name="T26"/></text:p>
              <text:p text:style-name="P11"><text:span text:style-name="T26">O mesmo vale para a quantidade de reclamações, clientes que precisam reclamar e entrar em contato com o suporte muitas vezes se tornam detrator, clientes que não precisam abrir reclamações são os com maior NPS, tendo uma média de NPS quase de promotor. </text:span></text:p>
            </draw:text-box>
          </draw:frame>
          <draw:frame draw:name="Google Shape;207;g3e7a2f80275_1_312:notes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Slide_20_5_20_master">
        <draw:custom-shape draw:name="Google Shape;230;p22" draw:style-name="gr2" draw:text-style-name="P3" draw:layer="layout" svg:width="13.035cm" svg:height="1.23cm" svg:x="1.378cm" svg:y="2.336cm">
          <text:p text:style-name="P2"><text:span text:style-name="T1">O que a Correlação Revelou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2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2" draw:style-name="gr15" draw:text-style-name="P3" draw:layer="layout" svg:width="2.895cm" svg:height="0.707cm" svg:x="1.378cm" svg:y="1.471cm">
          <text:p text:style-name="P11"><text:span text:style-name="T22"/></text:p>
          <draw:enhanced-geometry draw:mirror-horizontal="false" draw:mirror-vertical="false" draw:text-areas="?f5 ?f5 ?f6 ?f7" svg:viewBox="0 0 0 0" draw:type="ooxml-roundRect" draw:modifiers="190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3;p22" draw:style-name="gr2" draw:text-style-name="P3" draw:layer="layout" svg:width="2.069cm" svg:height="0.318cm" svg:x="1.988cm" svg:y="1.666cm">
          <text:p text:style-name="P25"><text:span text:style-name="T22">O 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22" draw:style-name="gr1" draw:text-style-name="P1" draw:layer="layout" svg:width="15.789cm" svg:height="9.873cm" svg:x="4.805cm" svg:y="3.866cm">
          <draw:image xlink:href="Pictures/1000020100000306000001E4FEB2A67C84BECC3C.png" xlink:type="simple" xlink:show="embed" xlink:actuate="onLoad">
            <text:p/>
          </draw:image>
        </draw:frame>
        <presentation:notes draw:style-name="dp2">
          <draw:page-thumbnail draw:name="Google Shape;226;g3e7a2f80275_1_301:notes" draw:style-name="gr6" draw:layer="layout" svg:width="15.239cm" svg:height="8.572cm" svg:x="1.905cm" svg:y="3.175cm" draw:page-number="9" presentation:class="page"/>
          <draw:frame draw:name="Google Shape;227;g3e7a2f80275_1_301:notes" presentation:style-name="pr7" draw:text-style-name="P19" draw:layer="layout" svg:width="15.239cm" svg:height="10.001cm" svg:x="1.905cm" svg:y="12.224cm" presentation:class="notes" presentation:user-transformed="true">
            <draw:text-box>
              <text:p text:style-name="P11"><text:span text:style-name="T26">Com uma análise dos pontos críticos de atraso e reclamações, nota-se que seria necessário uma melhora significativa de logística ou atendimento individualmente, porém uma melhoria da combinação destes consegue trazer resultados mais progressivos. Clientes com pouco atraso e poucas reclamações já possuem um perfil de cliente não detrator. </text:span></text:p>
            </draw:text-box>
          </draw:frame>
          <draw:frame draw:name="Google Shape;228;g3e7a2f80275_1_301:notes" presentation:style-name="pr8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DEFAULT">
        <draw:custom-shape draw:name="Google Shape;240;p23" draw:style-name="gr20" draw:text-style-name="P29" draw:layer="layout" svg:width="9.567cm" svg:height="11.309cm" svg:x="0.371cm" svg:y="2.391cm">
          <text:p text:style-name="P11"/>
          <draw:enhanced-geometry draw:mirror-horizontal="false" draw:mirror-vertical="false" draw:text-areas="?f5 ?f5 ?f6 ?f7" svg:viewBox="0 0 0 0" draw:type="ooxml-roundRect" draw:modifiers="585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1;p23" draw:style-name="gr21" draw:text-style-name="P3" draw:layer="layout" svg:width="8.56cm" svg:height="1.19cm" svg:x="0.689cm" svg:y="3.076cm">
          <text:p text:style-name="P11"><text:span text:style-name="T40">Prioridade de 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3" draw:style-name="gr22" draw:text-style-name="P3" draw:layer="layout" svg:width="8.127cm" svg:height="1.396cm" svg:x="0.635cm" svg:y="4.679cm">
          <text:p text:style-name="P11"><text:span text:style-name="T41">Baseada nos fatores com maior correlação com o N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3" draw:style-name="gr23" draw:text-style-name="P30" draw:layer="layout" svg:width="1.142cm" svg:height="1.142cm" svg:x="0.635cm" svg:y="6.858cm">
          <text:p text:style-name="P11"><text:span text:style-name="T42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4;p23" draw:style-name="gr22" draw:text-style-name="P3" draw:layer="layout" svg:width="6.857cm" svg:height="0.71cm" svg:x="2.083cm" svg:y="7.029cm">
          <text:p text:style-name="P11"><text:span text:style-name="T43">LOG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3" draw:style-name="gr24" draw:text-style-name="P31" draw:layer="layout" svg:width="1.142cm" svg:height="1.142cm" svg:x="0.635cm" svg:y="9.068cm">
          <text:p text:style-name="P1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6;p23" draw:style-name="gr22" draw:text-style-name="P3" draw:layer="layout" svg:width="1.142cm" svg:height="1.142cm" svg:x="0.635cm" svg:y="9.068cm">
          <text:p text:style-name="P32"><text:span text:style-name="T4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3" draw:style-name="gr22" draw:text-style-name="P3" draw:layer="layout" svg:width="6.857cm" svg:height="0.71cm" svg:x="2.083cm" svg:y="9.264cm">
          <text:p text:style-name="P11"><text:span text:style-name="T43">ATEND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3" draw:style-name="gr25" draw:text-style-name="P33" draw:layer="layout" svg:width="1.142cm" svg:height="1.142cm" svg:x="0.635cm" svg:y="11.277cm">
          <text:p text:style-name="P1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9;p23" draw:style-name="gr22" draw:text-style-name="P3" draw:layer="layout" svg:width="1.142cm" svg:height="1.142cm" svg:x="0.635cm" svg:y="11.277cm">
          <text:p text:style-name="P32"><text:span text:style-name="T4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23" draw:style-name="gr22" draw:text-style-name="P3" draw:layer="layout" svg:width="6.857cm" svg:height="0.71cm" svg:x="2.083cm" svg:y="11.474cm">
          <text:p text:style-name="P11"><text:span text:style-name="T43">MODELO 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3" draw:style-name="gr26" draw:text-style-name="P34" draw:layer="layout" svg:width="14.477cm" svg:height="3.25cm" svg:x="10.287cm" svg:y="2.84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23" draw:style-name="gr27" draw:text-style-name="P30" draw:layer="layout" svg:width="0.152cm" svg:height="3.25cm" svg:x="10.287cm" svg:y="2.84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23" draw:style-name="gr22" draw:text-style-name="P3" draw:layer="layout" svg:width="12.191cm" svg:height="0.812cm" svg:x="11.938cm" svg:y="3.048cm">
          <text:p text:style-name="P11"><text:span text:style-name="T45">Log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3" draw:style-name="gr21" draw:text-style-name="P3" draw:layer="layout" svg:width="13.766cm" svg:height="1.737cm" svg:x="10.617cm" svg:y="4.154cm">
          <text:list text:style-name="L33">
            <text:list-item>
              <text:p text:style-name="P35"><text:span text:style-name="T46">Priorização de entrega para pedidos em risco (3–4 dias)</text:span></text:p>
            </text:list-item>
            <text:list-item>
              <text:p text:style-name="P35"><text:span text:style-name="T46">SLA interno máximo de 4 dias de atras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3" draw:style-name="gr28" draw:text-style-name="P36" draw:layer="layout" svg:width="14.477cm" svg:height="3.25cm" svg:x="10.287cm" svg:y="6.3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23" draw:style-name="gr29" draw:text-style-name="P31" draw:layer="layout" svg:width="0.152cm" svg:height="3.25cm" svg:x="10.287cm" svg:y="6.3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3" draw:style-name="gr30" draw:text-style-name="P31" draw:layer="layout" svg:width="0.914cm" svg:height="0.914cm" svg:x="10.617cm" svg:y="6.656cm">
          <text:p text:style-name="P11"><text:span text:style-name="T4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8;p23" draw:style-name="gr22" draw:text-style-name="P3" draw:layer="layout" svg:width="12.191cm" svg:height="0.812cm" svg:x="11.938cm" svg:y="6.553cm">
          <text:p text:style-name="P11"><text:span text:style-name="T47">Atendimento (SA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3" draw:style-name="gr31" draw:text-style-name="P37" draw:layer="layout" svg:width="14.477cm" svg:height="3.25cm" svg:x="10.287cm" svg:y="9.85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23" draw:style-name="gr21" draw:text-style-name="P3" draw:layer="layout" svg:width="13.766cm" svg:height="1.98cm" svg:x="10.643cm" svg:y="7.62cm">
          <text:list text:style-name="L33">
            <text:list-item>
              <text:p text:style-name="P35"><text:span text:style-name="T46">Treinamento do time visando atingir resoluções no primeiro contato</text:span></text:p>
            </text:list-item>
            <text:list-item>
              <text:p text:style-name="P35"><text:span text:style-name="T46">Protocolos de escalação (N2) para clientes com 2+ reclamações</text:span></text:p>
            </text:list-item>
            <text:list-item>
              <text:p text:style-name="P35"><text:span text:style-name="T46">Notificar o cliente antes do limite de atraso, reduzindo interações do suporte</text:span></text:p>
            </text:list-item>
          </text:list>
          <text:p text:style-name="P11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3" draw:style-name="gr32" draw:text-style-name="P33" draw:layer="layout" svg:width="0.152cm" svg:height="3.25cm" svg:x="10.287cm" svg:y="9.85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3" draw:style-name="gr33" draw:text-style-name="P33" draw:layer="layout" svg:width="0.914cm" svg:height="0.914cm" svg:x="10.617cm" svg:y="10.123cm">
          <text:p text:style-name="P11"><text:span text:style-name="T4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3;p23" draw:style-name="gr22" draw:text-style-name="P3" draw:layer="layout" svg:width="12.191cm" svg:height="0.812cm" svg:x="11.938cm" svg:y="10.058cm">
          <text:p text:style-name="P11"><text:span text:style-name="T48">Estratégia &amp;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3" draw:style-name="gr21" draw:text-style-name="P3" draw:layer="layout" svg:width="13.766cm" svg:height="1.737cm" svg:x="10.617cm" svg:y="11.164cm">
          <text:list text:style-name="L33">
            <text:list-item>
              <text:p text:style-name="P35"><text:span text:style-name="T46">Implementar modelo binário (detrator/não detrator) com atraso + reclamações </text:span></text:p>
            </text:list-item>
            <text:list-item>
              <text:p text:style-name="P35"><text:span text:style-name="T46">Dashboard de NPS preditivo atualizado em tempo re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3" draw:style-name="gr15" draw:text-style-name="P3" draw:layer="layout" svg:width="2.895cm" svg:height="0.71cm" svg:x="1.378cm" svg:y="1.495cm">
          <text:p text:style-name="P11"/>
          <draw:enhanced-geometry draw:mirror-horizontal="false" draw:mirror-vertical="false" draw:text-areas="?f5 ?f5 ?f6 ?f7" svg:viewBox="0 0 0 0" draw:type="ooxml-roundRect" draw:modifiers="18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6;p23" draw:style-name="gr2" draw:text-style-name="P3" draw:layer="layout" svg:width="2.627cm" svg:height="0.307cm" svg:x="1.505cm" svg:y="1.685cm">
          <text:p text:style-name="P11"><text:span text:style-name="T22">RECOMEND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3" draw:style-name="gr34" draw:text-style-name="P30" draw:layer="layout" svg:width="0.914cm" svg:height="0.914cm" svg:x="10.617cm" svg:y="3.109cm">
          <text:p text:style-name="P11"><text:span text:style-name="T4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36;g3dc64f20a48_0_35:notes" draw:style-name="gr6" draw:layer="layout" svg:width="15.239cm" svg:height="8.572cm" svg:x="1.905cm" svg:y="3.175cm" draw:page-number="10" presentation:class="page"/>
          <draw:frame draw:name="Google Shape;237;g3dc64f20a48_0_35:notes" presentation:style-name="pr12" draw:text-style-name="P19" draw:layer="layout" svg:width="15.239cm" svg:height="10.001cm" svg:x="1.905cm" svg:y="12.224cm" presentation:class="notes" presentation:user-transformed="true">
            <draw:text-box>
              <text:p text:style-name="P38"><text:span text:style-name="T23">"Com esses dados, chegamos a três prioridades. Primeiro, logística: alertas automáticos quando o atraso superar 2 dias, priorização de reentrega entre 3 e 4 dias, e SLA interno máximo de 4 dias. Segundo, atendimento: resolver no primeiro contato, máximo 2 interações por ocorrência, e contato proativo com clientes de pedidos atrasados antes que reclamem. Terceiro, modelo de machine learning: classificar clientes como risco de detração usando atraso e reclamações, com dashboard de NPS preditivo em tempo real."</text:span></text:p>
              <text:p text:style-name="P39"><text:span text:style-name="T23"/></text:p>
            </draw:text-box>
          </draw:frame>
          <draw:frame draw:name="Google Shape;238;g3dc64f20a48_0_35:notes" presentation:style-name="pr13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Slide_20_2_20_master">
        <draw:custom-shape draw:name="Google Shape;273;p24" draw:style-name="gr2" draw:text-style-name="P3" draw:layer="layout" svg:width="10.768cm" svg:height="1.23cm" svg:x="1.378cm" svg:y="2.37cm">
          <text:p text:style-name="P2"><text:span text:style-name="T1">Os riscos da estratég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4" draw:style-name="gr7" draw:text-style-name="P5" draw:layer="layout" svg:width="7.412cm" svg:height="4.617cm" svg:x="0.868cm" svg:y="6.114cm">
          <text:p text:style-name="P11"/>
          <draw:enhanced-geometry draw:mirror-horizontal="false" draw:mirror-vertical="false" draw:text-areas="?f5 ?f5 ?f6 ?f7" svg:viewBox="0 0 0 0" draw:type="ooxml-roundRect" draw:modifiers="61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5;p24" draw:style-name="gr8" draw:text-style-name="P3" draw:layer="layout" svg:width="6.439cm" svg:height="3.303cm" svg:x="1.355cm" svg:y="6.771cm">
          <text:p text:style-name="P16"><text:span text:style-name="T49">Base assimétrica</text:span></text:p>
          <text:p text:style-name="P40"><text:span text:style-name="T50">Com 80% de detratores, a base não representa uma operação equilibrada. Os dados podem refletir um período atípico, recomenda-se validar com dados de outros períodos antes de tomar decisões estruturai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4" draw:style-name="gr15" draw:text-style-name="P3" draw:layer="layout" svg:width="3.51cm" svg:height="0.734cm" svg:x="1.378cm" svg:y="1.472cm">
          <text:p text:style-name="P11"/>
          <draw:enhanced-geometry draw:mirror-horizontal="false" draw:mirror-vertical="false" draw:text-areas="?f5 ?f5 ?f6 ?f7" svg:viewBox="0 0 0 0" draw:type="ooxml-roundRect" draw:modifiers="18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7;p24" draw:style-name="gr4" draw:text-style-name="P3" draw:layer="layout" svg:width="3.133cm" svg:height="0.472cm" svg:x="1.628cm" svg:y="1.603cm">
          <text:p text:style-name="P11"><text:span text:style-name="T22">LIMITAÇÕES E RIS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24" draw:style-name="gr7" draw:text-style-name="P5" draw:layer="layout" svg:width="7.412cm" svg:height="4.617cm" svg:x="8.994cm" svg:y="6.114cm">
          <text:p text:style-name="P11"/>
          <draw:enhanced-geometry draw:mirror-horizontal="false" draw:mirror-vertical="false" draw:text-areas="?f5 ?f5 ?f6 ?f7" svg:viewBox="0 0 0 0" draw:type="ooxml-roundRect" draw:modifiers="61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9;p24" draw:style-name="gr8" draw:text-style-name="P3" draw:layer="layout" svg:width="6.439cm" svg:height="3.303cm" svg:x="9.48cm" svg:y="6.771cm">
          <text:p text:style-name="P11"><text:span text:style-name="T49">Viés de resposta</text:span></text:p>
          <text:p text:style-name="P40"><text:span text:style-name="T50">O dataset considera apenas clientes que responderam ao NPS. Clientes mais insatisfeitos tendem responder e a gerar reclamações. Saber os motivos dessas reclamações, nos dará visibilidade para futuras açõ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24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4" draw:style-name="gr7" draw:text-style-name="P5" draw:layer="layout" svg:width="7.412cm" svg:height="4.617cm" svg:x="17.119cm" svg:y="6.114cm">
          <text:p text:style-name="P11"/>
          <draw:enhanced-geometry draw:mirror-horizontal="false" draw:mirror-vertical="false" draw:text-areas="?f5 ?f5 ?f6 ?f7" svg:viewBox="0 0 0 0" draw:type="ooxml-roundRect" draw:modifiers="61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2;p24" draw:style-name="gr8" draw:text-style-name="P3" draw:layer="layout" svg:width="6.439cm" svg:height="3.303cm" svg:x="17.605cm" svg:y="6.771cm">
          <text:p text:style-name="P4"><text:span text:style-name="T49">Modelo pouco robusto</text:span></text:p>
          <text:p text:style-name="P40"><text:span text:style-name="T50">Dado a própria base e a condição do NPS atual, a opção de um modelo binário irá ajudar uma estratégia inicial, mas após um aumento inicial do NPS, poderá ser necessário reavaliar o modelo e a estratégi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9;g3e7a2f80275_0_205:notes" draw:style-name="gr6" draw:layer="layout" svg:width="15.239cm" svg:height="8.572cm" svg:x="1.905cm" svg:y="3.175cm" draw:page-number="11" presentation:class="page"/>
          <draw:frame draw:name="Google Shape;270;g3e7a2f80275_0_205:notes" presentation:style-name="pr3" draw:text-style-name="P19" draw:layer="layout" svg:width="15.239cm" svg:height="10.001cm" svg:x="1.905cm" svg:y="12.224cm" presentation:class="notes" presentation:user-transformed="true">
            <draw:text-box>
              <text:p text:style-name="P18"><text:span text:style-name="T23">Antes de encerrar, é importante sermos honestos sobre os limites da análise. A base assimétrica — com 80% de detratores — pode refletir um período atípico, e recomendamos validar com dados de outros períodos. Há viés de resposta: nem todos os clientes insatisfeitos respondem ao NPS. E o modelo binário que propomos é um ponto de partida sólido — mas precisará ser reavaliado conforme o NPS evolua. </text:span></text:p>
            </draw:text-box>
          </draw:frame>
          <draw:frame draw:name="Google Shape;271;g3e7a2f80275_0_205:notes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Slide_20_1_20_master">
        <draw:frame draw:name="Google Shape;288;p25" draw:style-name="gr1" draw:text-style-name="P1" draw:layer="layout" svg:width="10cm" svg:height="14.287cm" svg:x="0cm" svg:y="0cm">
          <draw:image xlink:href="Pictures/10000201000005E800000870F82ECE8A1810778B.png" xlink:type="simple" xlink:show="embed" xlink:actuate="onLoad">
            <text:p/>
          </draw:image>
        </draw:frame>
        <draw:custom-shape draw:name="Google Shape;289;p25" draw:style-name="gr2" draw:text-style-name="P3" draw:layer="layout" svg:width="13.118cm" svg:height="1.522cm" svg:x="10.903cm" svg:y="4.452cm">
          <text:p text:style-name="P2"><text:span text:style-name="T1">Encerra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25" draw:style-name="gr2" draw:text-style-name="P3" draw:layer="layout" svg:width="13.118cm" svg:height="2.535cm" svg:x="10.903cm" svg:y="6.148cm">
          <text:p text:style-name="P4"><text:span text:style-name="T3">Os dados operacionais já contam a história do cliente. Nossa proposta é usar essa história para agir antes que o problema aconteça.</text:span></text:p>
          <text:p text:style-name="P4"><text:span text:style-name="T3"/></text:p>
          <text:p text:style-name="P4"><text:span text:style-name="T3">Obrigado!</text:span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5" draw:style-name="gr3" draw:text-style-name="P5" draw:layer="layout" svg:width="3.586cm" svg:height="0.707cm" svg:x="10.903cm" svg:y="9.113cm">
          <text:p text:style-name="P11"/>
          <draw:enhanced-geometry draw:mirror-horizontal="false" draw:mirror-vertical="false" draw:text-areas="?f5 ?f5 ?f6 ?f7" svg:viewBox="0 0 0 0" draw:type="ooxml-roundRect" draw:modifiers="186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2;p25" draw:style-name="gr4" draw:text-style-name="P3" draw:layer="layout" svg:width="3.225cm" svg:height="0.341cm" svg:x="11.139cm" svg:y="9.296cm">
          <text:p text:style-name="P6"><text:span text:style-name="T5">POSTECH · FIAP· IAS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5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5" draw:style-name="gr3" draw:text-style-name="P5" draw:layer="layout" svg:width="1.927cm" svg:height="0.707cm" svg:x="14.581cm" svg:y="9.113cm">
          <text:p text:style-name="P11"/>
          <draw:enhanced-geometry draw:mirror-horizontal="false" draw:mirror-vertical="false" draw:text-areas="?f5 ?f5 ?f6 ?f7" svg:viewBox="0 0 0 0" draw:type="ooxml-roundRect" draw:modifiers="186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5;p25" draw:style-name="gr2" draw:text-style-name="P3" draw:layer="layout" svg:width="1.472cm" svg:height="0.341cm" svg:x="14.817cm" svg:y="9.296cm">
          <text:p text:style-name="P6"><text:span text:style-name="T5">Grupo 19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25" draw:style-name="gr3" draw:text-style-name="P5" draw:layer="layout" svg:width="5.604cm" svg:height="1.18cm" svg:x="10.903cm" svg:y="10.039cm">
          <text:p text:style-name="P11"/>
          <draw:enhanced-geometry draw:mirror-horizontal="false" draw:mirror-vertical="false" draw:text-areas="?f5 ?f5 ?f6 ?f7" svg:viewBox="0 0 0 0" draw:type="ooxml-roundRect" draw:modifiers="186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7;p25" draw:style-name="gr2" draw:text-style-name="P3" draw:layer="layout" svg:width="5.427cm" svg:height="1.063cm" svg:x="11.139cm" svg:y="10.213cm">
          <text:p text:style-name="P6"><text:span text:style-name="T5">Julio Cesar de Oliveira Matos </text:span></text:p>
          <text:p text:style-name="P6"><text:span text:style-name="T5">Saulo Freitas e Sil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25" draw:style-name="gr2" draw:text-style-name="P3" draw:layer="layout" svg:width="1.179cm" svg:height="1.063cm" svg:x="15.251cm" svg:y="10.213cm">
          <text:p text:style-name="P6"><text:span text:style-name="T5">369221</text:span></text:p>
          <text:p text:style-name="P6"><text:span text:style-name="T5">3723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4;g3dd89950d5a_0_0:notes" draw:style-name="gr6" draw:layer="layout" svg:width="15.239cm" svg:height="8.572cm" svg:x="1.905cm" svg:y="3.175cm" draw:page-number="12" presentation:class="page"/>
          <draw:frame draw:name="Google Shape;285;g3dd89950d5a_0_0:notes" presentation:style-name="pr14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86;g3dd89950d5a_0_0:notes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3" draw:style-name="dp4" draw:master-page-name="DEFAULT">
        <draw:custom-shape draw:name="Google Shape;304;p26" draw:style-name="gr35" draw:text-style-name="P41" draw:layer="layout" svg:width="5.587cm" svg:height="0.71cm" svg:x="1.143cm" svg:y="0.559cm">
          <text:p text:style-name="P11"/>
          <draw:enhanced-geometry draw:mirror-horizontal="false" draw:mirror-vertical="false" draw:text-areas="?f5 ?f5 ?f6 ?f7" svg:viewBox="0 0 0 0" draw:type="ooxml-roundRect" draw:modifiers="1785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5;p26" draw:style-name="gr22" draw:text-style-name="P3" draw:layer="layout" svg:width="5.587cm" svg:height="0.761cm" svg:x="1.143cm" svg:y="0.533cm">
          <text:p text:style-name="P32"><text:span text:style-name="T51">RECOMEND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26" draw:style-name="gr36" draw:text-style-name="P42" draw:layer="layout" svg:width="0.152cm" svg:height="1.777cm" svg:x="1.143cm" svg:y="1.57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26" draw:style-name="gr22" draw:text-style-name="P3" draw:layer="layout" svg:width="22.351cm" svg:height="1.98cm" svg:x="1.575cm" svg:y="1.473cm">
          <text:p text:style-name="P11"><text:span text:style-name="T52">Roadmap de Implemen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26" draw:style-name="gr22" draw:text-style-name="P3" draw:layer="layout" svg:width="22.859cm" svg:height="0.761cm" svg:x="1.575cm" svg:y="3.404cm">
          <text:p text:style-name="P11"><text:span text:style-name="T53">Da análise exploratória à ação: o que implementar em cada horizonte de tem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26" draw:style-name="gr37" draw:text-style-name="P1" draw:layer="layout" svg:width="22.351cm" svg:height="0.001cm" svg:x="2.286cm" svg:y="6.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0;p26" draw:style-name="gr27" draw:text-style-name="P30" draw:layer="layout" svg:width="0.659cm" svg:height="0.659cm" svg:x="4.242cm" svg:y="6.02cm">
          <text:p text:style-name="P1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1;p26" draw:style-name="gr38" draw:text-style-name="P34" draw:layer="layout" svg:width="7.111cm" svg:height="6.603cm" svg:x="1.143cm" svg:y="7.11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26" draw:style-name="gr27" draw:text-style-name="P30" draw:layer="layout" svg:width="7.111cm" svg:height="0.152cm" svg:x="1.143cm" svg:y="7.11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26" draw:style-name="gr27" draw:text-style-name="P30" draw:layer="layout" svg:width="1.142cm" svg:height="1.142cm" svg:x="1.6cm" svg:y="7.417cm">
          <text:p text:style-name="P1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314;p26" draw:style-name="gr1" draw:text-style-name="P1" draw:layer="layout" svg:width="0.939cm" svg:height="0.939cm" svg:x="1.702cm" svg:y="7.518cm">
          <draw:image xlink:href="Pictures/10000201000001000000010042760C11B9FE551D.png" xlink:type="simple" xlink:show="embed" xlink:actuate="onLoad">
            <text:p/>
          </draw:image>
        </draw:frame>
        <draw:custom-shape draw:name="Google Shape;315;p26" draw:style-name="gr22" draw:text-style-name="P3" draw:layer="layout" svg:width="4.952cm" svg:height="0.71cm" svg:x="3.048cm" svg:y="7.315cm">
          <text:p text:style-name="P11"><text:span text:style-name="T54">Imedia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26" draw:style-name="gr22" draw:text-style-name="P3" draw:layer="layout" svg:width="4.952cm" svg:height="0.558cm" svg:x="3.048cm" svg:y="8.026cm">
          <text:p text:style-name="P11"><text:span text:style-name="T55">0–30 d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26" draw:style-name="gr21" draw:text-style-name="P3" draw:layer="layout" svg:width="6.4cm" svg:height="4.698cm" svg:x="1.6cm" svg:y="8.738cm">
          <text:list text:style-name="L42">
            <text:list-item>
              <text:p text:style-name="P35"><text:span text:style-name="T56">Configurar alertas de atraso (&gt;2 dias) no sistema de pedidos</text:span></text:p>
            </text:list-item>
            <text:list-item>
              <text:p text:style-name="P35"><text:span text:style-name="T56">Script de contato proativo do SAC para pedidos atrasados</text:span></text:p>
            </text:list-item>
            <text:list-item>
              <text:p text:style-name="P35"><text:span text:style-name="T56">Dashboard simples: volume de atrasos por d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26" draw:style-name="gr29" draw:text-style-name="P31" draw:layer="layout" svg:width="0.659cm" svg:height="0.659cm" svg:x="12.052cm" svg:y="6.02cm">
          <text:p text:style-name="P1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9;p26" draw:style-name="gr39" draw:text-style-name="P36" draw:layer="layout" svg:width="7.492cm" svg:height="6.603cm" svg:x="8.763cm" svg:y="7.11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26" draw:style-name="gr29" draw:text-style-name="P31" draw:layer="layout" svg:width="7.492cm" svg:height="0.152cm" svg:x="8.763cm" svg:y="7.11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26" draw:style-name="gr29" draw:text-style-name="P31" draw:layer="layout" svg:width="1.142cm" svg:height="1.142cm" svg:x="9.22cm" svg:y="7.417cm">
          <text:p text:style-name="P1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322;p26" draw:style-name="gr1" draw:text-style-name="P1" draw:layer="layout" svg:width="0.939cm" svg:height="0.939cm" svg:x="9.322cm" svg:y="7.518cm">
          <draw:image xlink:href="Pictures/100002010000010000000100A419B51FD0D8244D.png" xlink:type="simple" xlink:show="embed" xlink:actuate="onLoad">
            <text:p/>
          </draw:image>
        </draw:frame>
        <draw:custom-shape draw:name="Google Shape;323;p26" draw:style-name="gr22" draw:text-style-name="P3" draw:layer="layout" svg:width="5.333cm" svg:height="0.71cm" svg:x="10.668cm" svg:y="7.315cm">
          <text:p text:style-name="P11"><text:span text:style-name="T57">Curto Praz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26" draw:style-name="gr22" draw:text-style-name="P3" draw:layer="layout" svg:width="5.333cm" svg:height="0.558cm" svg:x="10.668cm" svg:y="8.026cm">
          <text:p text:style-name="P11"><text:span text:style-name="T55">30–90 d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26" draw:style-name="gr21" draw:text-style-name="P3" draw:layer="layout" svg:width="6.781cm" svg:height="4.698cm" svg:x="9.22cm" svg:y="8.738cm">
          <text:list text:style-name="L42">
            <text:list-item>
              <text:p text:style-name="P35"><text:span text:style-name="T56">Protocolo de priorização de reentrega (3–4 dias de atraso)</text:span></text:p>
            </text:list-item>
            <text:list-item>
              <text:p text:style-name="P35"><text:span text:style-name="T56">Meta de SAC: ≤2 interações por ocorrência com acompanhamento semanal</text:span></text:p>
            </text:list-item>
            <text:list-item>
              <text:p text:style-name="P35"><text:span text:style-name="T56">Modelo ML binário (risco/sem risco) em ambiente de tes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26" draw:style-name="gr32" draw:text-style-name="P33" draw:layer="layout" svg:width="0.659cm" svg:height="0.659cm" svg:x="19.926cm" svg:y="6.02cm">
          <text:p text:style-name="P1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7;p26" draw:style-name="gr40" draw:text-style-name="P37" draw:layer="layout" svg:width="7.238cm" svg:height="6.603cm" svg:x="16.764cm" svg:y="7.11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26" draw:style-name="gr32" draw:text-style-name="P33" draw:layer="layout" svg:width="7.238cm" svg:height="0.152cm" svg:x="16.764cm" svg:y="7.11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26" draw:style-name="gr32" draw:text-style-name="P33" draw:layer="layout" svg:width="1.142cm" svg:height="1.142cm" svg:x="17.221cm" svg:y="7.417cm">
          <text:p text:style-name="P1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330;p26" draw:style-name="gr1" draw:text-style-name="P1" draw:layer="layout" svg:width="0.939cm" svg:height="0.939cm" svg:x="17.323cm" svg:y="7.518cm">
          <draw:image xlink:href="Pictures/100002010000010000000100C79C447C51D61E6F.png" xlink:type="simple" xlink:show="embed" xlink:actuate="onLoad">
            <text:p/>
          </draw:image>
        </draw:frame>
        <draw:custom-shape draw:name="Google Shape;331;p26" draw:style-name="gr22" draw:text-style-name="P3" draw:layer="layout" svg:width="5.079cm" svg:height="0.71cm" svg:x="18.669cm" svg:y="7.315cm">
          <text:p text:style-name="P11"><text:span text:style-name="T58">Médio Praz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26" draw:style-name="gr22" draw:text-style-name="P3" draw:layer="layout" svg:width="5.079cm" svg:height="0.558cm" svg:x="18.669cm" svg:y="8.026cm">
          <text:p text:style-name="P11"><text:span text:style-name="T55">90–180 d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26" draw:style-name="gr21" draw:text-style-name="P3" draw:layer="layout" svg:width="6.527cm" svg:height="4.698cm" svg:x="17.221cm" svg:y="8.738cm">
          <text:list text:style-name="L42">
            <text:list-item>
              <text:p text:style-name="P35"><text:span text:style-name="T56">Deploy do modelo preditivo em produção</text:span></text:p>
            </text:list-item>
            <text:list-item>
              <text:p text:style-name="P35"><text:span text:style-name="T56">NPS preditivo integrado ao dashboard operacional</text:span></text:p>
            </text:list-item>
            <text:list-item>
              <text:p text:style-name="P35"><text:span text:style-name="T56">Ciclo de retreinamento do modelo (trimestral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26" draw:style-name="gr41" draw:text-style-name="P34" draw:layer="layout" svg:width="23.113cm" svg:height="0.558cm" svg:x="1.143cm" svg:y="13.411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26" draw:style-name="gr22" draw:text-style-name="P3" draw:layer="layout" svg:width="22.605cm" svg:height="0.609cm" svg:x="1.397cm" svg:y="13.386cm">
          <text:p text:style-name="P11"><text:span text:style-name="T59">💡 <text:s/></text:span><text:span text:style-name="T59">Começar simples é melhor do que não começar: um alerta de atraso já impacta clientes em risco antes que virem detrator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0;g3dc64f20a48_0_75:notes" draw:style-name="gr6" draw:layer="layout" svg:width="15.239cm" svg:height="8.572cm" svg:x="1.905cm" svg:y="3.175cm" draw:page-number="13" presentation:class="page"/>
          <draw:frame draw:name="Google Shape;301;g3dc64f20a48_0_75:notes" presentation:style-name="pr15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02;g3dc64f20a48_0_75:notes" presentation:style-name="pr13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4" draw:style-name="dp4" draw:master-page-name="DEFAULT">
        <draw:custom-shape draw:name="Google Shape;341;p27" draw:style-name="gr35" draw:text-style-name="P41" draw:layer="layout" svg:width="5.587cm" svg:height="0.71cm" svg:x="1.143cm" svg:y="0.559cm">
          <text:p text:style-name="P11"/>
          <draw:enhanced-geometry draw:mirror-horizontal="false" draw:mirror-vertical="false" draw:text-areas="?f5 ?f5 ?f6 ?f7" svg:viewBox="0 0 0 0" draw:type="ooxml-roundRect" draw:modifiers="1785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2;p27" draw:style-name="gr22" draw:text-style-name="P3" draw:layer="layout" svg:width="5.587cm" svg:height="0.761cm" svg:x="1.143cm" svg:y="0.533cm">
          <text:p text:style-name="P32"><text:span text:style-name="T51">RECOMEND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27" draw:style-name="gr36" draw:text-style-name="P42" draw:layer="layout" svg:width="0.152cm" svg:height="1.727cm" svg:x="1.143cm" svg:y="1.57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27" draw:style-name="gr22" draw:text-style-name="P3" draw:layer="layout" svg:width="23.367cm" svg:height="1.904cm" svg:x="1.524cm" svg:y="1.473cm">
          <text:p text:style-name="P11"><text:span text:style-name="T60">O que fazer agor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27" draw:style-name="gr22" draw:text-style-name="P3" draw:layer="layout" svg:width="23.367cm" svg:height="0.888cm" svg:x="1.524cm" svg:y="3.302cm">
          <text:p text:style-name="P11"><text:span text:style-name="T61">"Cada dia de atraso e cada reclamação não resolvida aproxima o cliente da detração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27" draw:style-name="gr26" draw:text-style-name="P34" draw:layer="layout" svg:width="11.302cm" svg:height="4.622cm" svg:x="1.143cm" svg:y="4.369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27" draw:style-name="gr27" draw:text-style-name="P30" draw:layer="layout" svg:width="0.177cm" svg:height="4.622cm" svg:x="1.143cm" svg:y="4.369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27" draw:style-name="gr27" draw:text-style-name="P30" draw:layer="layout" svg:width="1.269cm" svg:height="1.269cm" svg:x="1.6cm" svg:y="4.699cm">
          <text:p text:style-name="P1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349;p27" draw:style-name="gr1" draw:text-style-name="P1" draw:layer="layout" svg:width="1.015cm" svg:height="1.015cm" svg:x="1.727cm" svg:y="4.826cm">
          <draw:image xlink:href="Pictures/10000201000001000000010038C91A90C7F9CD54.png" xlink:type="simple" xlink:show="embed" xlink:actuate="onLoad">
            <text:p/>
          </draw:image>
        </draw:frame>
        <draw:custom-shape draw:name="Google Shape;350;p27" draw:style-name="gr22" draw:text-style-name="P3" draw:layer="layout" svg:width="8.889cm" svg:height="1.066cm" svg:x="3.226cm" svg:y="4.623cm">
          <text:p text:style-name="P11"><text:span text:style-name="T62">🚨 <text:s/></text:span><text:span text:style-name="T62">Alertas automáticos de atra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27" draw:style-name="gr21" draw:text-style-name="P3" draw:layer="layout" svg:width="10.591cm" svg:height="2.793cm" svg:x="1.6cm" svg:y="5.944cm">
          <text:p text:style-name="P11"><text:span text:style-name="T63">Implementar alertas em tempo real quando o atraso superar 2 dias. Após 5 dias de atraso, 100% dos clientes tornam-se detratores — agir antes desse limiar é crític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27" draw:style-name="gr28" draw:text-style-name="P36" draw:layer="layout" svg:width="11.302cm" svg:height="4.622cm" svg:x="12.878cm" svg:y="4.369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27" draw:style-name="gr29" draw:text-style-name="P31" draw:layer="layout" svg:width="0.177cm" svg:height="4.622cm" svg:x="12.878cm" svg:y="4.369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27" draw:style-name="gr29" draw:text-style-name="P31" draw:layer="layout" svg:width="1.269cm" svg:height="1.269cm" svg:x="13.335cm" svg:y="4.699cm">
          <text:p text:style-name="P1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355;p27" draw:style-name="gr1" draw:text-style-name="P1" draw:layer="layout" svg:width="1.015cm" svg:height="1.015cm" svg:x="13.462cm" svg:y="4.826cm">
          <draw:image xlink:href="Pictures/100002010000010000000100136A1B5B0F07FE3D.png" xlink:type="simple" xlink:show="embed" xlink:actuate="onLoad">
            <text:p/>
          </draw:image>
        </draw:frame>
        <draw:custom-shape draw:name="Google Shape;356;p27" draw:style-name="gr22" draw:text-style-name="P3" draw:layer="layout" svg:width="8.889cm" svg:height="1.066cm" svg:x="14.961cm" svg:y="4.623cm">
          <text:p text:style-name="P11"><text:span text:style-name="T62">📞 <text:s/></text:span><text:span text:style-name="T62">Resolução no primeiro conta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27" draw:style-name="gr21" draw:text-style-name="P3" draw:layer="layout" svg:width="10.591cm" svg:height="2.793cm" svg:x="13.335cm" svg:y="5.944cm">
          <text:p text:style-name="P11"><text:span text:style-name="T63">Priorizar resolução em até 1 interação. Clientes com 2+ reclamações já entram na faixa de detratores. Reduzir o tempo de resolução é tão importante quanto resolver o problem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27" draw:style-name="gr42" draw:text-style-name="P43" draw:layer="layout" svg:width="11.302cm" svg:height="4.622cm" svg:x="1.143cm" svg:y="9.271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27" draw:style-name="gr43" draw:text-style-name="P44" draw:layer="layout" svg:width="0.177cm" svg:height="4.622cm" svg:x="1.143cm" svg:y="9.271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27" draw:style-name="gr43" draw:text-style-name="P44" draw:layer="layout" svg:width="1.269cm" svg:height="1.269cm" svg:x="1.6cm" svg:y="9.601cm">
          <text:p text:style-name="P1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361;p27" draw:style-name="gr1" draw:text-style-name="P1" draw:layer="layout" svg:width="1.015cm" svg:height="1.015cm" svg:x="1.727cm" svg:y="9.728cm">
          <draw:image xlink:href="Pictures/10000201000001000000010042760C11B9FE551D.png" xlink:type="simple" xlink:show="embed" xlink:actuate="onLoad">
            <text:p/>
          </draw:image>
        </draw:frame>
        <draw:custom-shape draw:name="Google Shape;362;p27" draw:style-name="gr22" draw:text-style-name="P3" draw:layer="layout" svg:width="8.889cm" svg:height="1.066cm" svg:x="3.226cm" svg:y="9.525cm">
          <text:p text:style-name="P11"><text:span text:style-name="T62">📊 <text:s/></text:span><text:span text:style-name="T62">Dashboard de risco em tempo re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27" draw:style-name="gr21" draw:text-style-name="P3" draw:layer="layout" svg:width="10.591cm" svg:height="2.793cm" svg:x="1.6cm" svg:y="10.846cm">
          <text:p text:style-name="P11"><text:span text:style-name="T63">Criar painel que identifique pedidos com alto risco de detração ainda durante a jornada — combinando atraso e reclamações. Meta: intervir antes da pesquisa de NPS ser aplicad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27" draw:style-name="gr31" draw:text-style-name="P37" draw:layer="layout" svg:width="11.302cm" svg:height="4.622cm" svg:x="12.878cm" svg:y="9.271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27" draw:style-name="gr32" draw:text-style-name="P33" draw:layer="layout" svg:width="0.177cm" svg:height="4.622cm" svg:x="12.878cm" svg:y="9.271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27" draw:style-name="gr32" draw:text-style-name="P33" draw:layer="layout" svg:width="1.269cm" svg:height="1.269cm" svg:x="13.335cm" svg:y="9.601cm">
          <text:p text:style-name="P1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367;p27" draw:style-name="gr1" draw:text-style-name="P1" draw:layer="layout" svg:width="1.015cm" svg:height="1.015cm" svg:x="13.462cm" svg:y="9.728cm">
          <draw:image xlink:href="Pictures/10000201000001000000010052608ABCE0645C73.png" xlink:type="simple" xlink:show="embed" xlink:actuate="onLoad">
            <text:p/>
          </draw:image>
        </draw:frame>
        <draw:custom-shape draw:name="Google Shape;368;p27" draw:style-name="gr22" draw:text-style-name="P3" draw:layer="layout" svg:width="8.889cm" svg:height="1.066cm" svg:x="14.961cm" svg:y="9.525cm">
          <text:p text:style-name="P11"><text:span text:style-name="T62">🤖 <text:s/></text:span><text:span text:style-name="T62">Modelo preditivo de detr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27" draw:style-name="gr21" draw:text-style-name="P3" draw:layer="layout" svg:width="10.591cm" svg:height="2.793cm" svg:x="13.335cm" svg:y="10.846cm">
          <text:p text:style-name="P11"><text:span text:style-name="T63">Usar delivery_delay_days e complaints_count para classificar clientes como 'risco de detração' antes do fim da jornada. Classificação binária como ponto de partida imedia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7;g3dc64f20a48_0_2:notes" draw:style-name="gr6" draw:layer="layout" svg:width="15.239cm" svg:height="8.572cm" svg:x="1.905cm" svg:y="3.175cm" draw:page-number="14" presentation:class="page"/>
          <draw:frame draw:name="Google Shape;338;g3dc64f20a48_0_2:notes" presentation:style-name="pr16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39;g3dc64f20a48_0_2:notes" presentation:style-name="pr13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5" draw:style-name="dp5" draw:master-page-name="Slide_20_9_20_master">
        <draw:custom-shape draw:name="Google Shape;375;p28" draw:style-name="gr15" draw:text-style-name="P3" draw:layer="layout" svg:width="1.533cm" svg:height="0.286cm" svg:x="0.689cm" svg:y="0.541cm">
          <text:p text:style-name="P11"/>
          <draw:enhanced-geometry draw:mirror-horizontal="false" draw:mirror-vertical="false" draw:text-areas="?f5 ?f5 ?f6 ?f7" svg:viewBox="0 0 0 0" draw:type="ooxml-roundRect" draw:modifiers="2075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6;p28" draw:style-name="gr2" draw:text-style-name="P3" draw:layer="layout" svg:width="1.294cm" svg:height="0.153cm" svg:x="0.808cm" svg:y="0.608cm">
          <text:p text:style-name="P11"><text:span text:style-name="T64">MODELO PREDIT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28" draw:style-name="gr2" draw:text-style-name="P3" draw:layer="layout" svg:width="8.258cm" svg:height="0.553cm" svg:x="0.689cm" svg:y="0.86cm">
          <text:p text:style-name="P45"><text:span text:style-name="T65">Próximos Passos: NPS Antes da Pesqui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8;p28" draw:style-name="gr1" draw:text-style-name="P1" draw:layer="layout" svg:width="16.703cm" svg:height="11.51cm" svg:x="4.348cm" svg:y="1.533cm">
          <draw:image xlink:href="Pictures/10000201000009C4000006BAE061D6F4B55AFCDC.png" xlink:type="simple" xlink:show="embed" xlink:actuate="onLoad">
            <text:p/>
          </draw:image>
        </draw:frame>
        <draw:custom-shape draw:name="Google Shape;379;p28" draw:style-name="gr2" draw:text-style-name="P3" draw:layer="layout" svg:width="4.564cm" svg:height="0.607cm" svg:x="4.766cm" svg:y="8.696cm">
          <text:p text:style-name="P46"><text:span text:style-name="T24">Dados Operacio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28" draw:style-name="gr1" draw:text-style-name="P1" draw:layer="layout" svg:width="1.08cm" svg:height="1.08cm" svg:x="6.716cm" svg:y="5.763cm">
          <draw:image xlink:href="Pictures/100002010000006400000064E4D8AF011C704690.png" xlink:type="simple" xlink:show="embed" xlink:actuate="onLoad">
            <text:p/>
          </draw:image>
        </draw:frame>
        <draw:custom-shape draw:name="Google Shape;381;p28" draw:style-name="gr2" draw:text-style-name="P3" draw:layer="layout" svg:width="4.712cm" svg:height="0.607cm" svg:x="8.656cm" svg:y="3.862cm">
          <text:p text:style-name="P46"><text:span text:style-name="T24">Modelo 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2;p28" draw:style-name="gr1" draw:text-style-name="P1" draw:layer="layout" svg:width="1.08cm" svg:height="1.08cm" svg:x="10.133cm" svg:y="6.423cm">
          <draw:image xlink:href="Pictures/100002010000006400000064CA2A9EF052F6A463.png" xlink:type="simple" xlink:show="embed" xlink:actuate="onLoad">
            <text:p/>
          </draw:image>
        </draw:frame>
        <draw:custom-shape draw:name="Google Shape;383;p28" draw:style-name="gr2" draw:text-style-name="P3" draw:layer="layout" svg:width="4.564cm" svg:height="0.607cm" svg:x="11.82cm" svg:y="10.112cm">
          <text:p text:style-name="P46"><text:span text:style-name="T24">Score de Ris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4;p28" draw:style-name="gr1" draw:text-style-name="P1" draw:layer="layout" svg:width="1.08cm" svg:height="1.08cm" svg:x="13.55cm" svg:y="7.082cm">
          <draw:image xlink:href="Pictures/100002010000006400000064A6BF270228A4DCD7.png" xlink:type="simple" xlink:show="embed" xlink:actuate="onLoad">
            <text:p/>
          </draw:image>
        </draw:frame>
        <draw:custom-shape draw:name="Google Shape;385;p28" draw:style-name="gr2" draw:text-style-name="P3" draw:layer="layout" svg:width="4.564cm" svg:height="0.607cm" svg:x="15.872cm" svg:y="5.134cm">
          <text:p text:style-name="P46"><text:span text:style-name="T24">Ação Proati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6;p28" draw:style-name="gr1" draw:text-style-name="P1" draw:layer="layout" svg:width="1.08cm" svg:height="1.08cm" svg:x="17.187cm" svg:y="7.789cm">
          <draw:image xlink:href="Pictures/100002010000006400000064438DAD87886A2C48.png" xlink:type="simple" xlink:show="embed" xlink:actuate="onLoad">
            <text:p/>
          </draw:image>
        </draw:frame>
        <draw:custom-shape draw:name="Google Shape;387;p28" draw:style-name="gr2" draw:text-style-name="P3" draw:layer="layout" svg:width="24.021cm" svg:height="0.191cm" svg:x="0.689cm" svg:y="13.134cm">
          <text:p text:style-name="P11"><text:span text:style-name="T66">O modelo permitiria agir </text:span><text:span text:style-name="T67">durante</text:span><text:span text:style-name="T66"> a jornada, antes que o problema se consolide na pesquisa de NP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28" draw:style-name="gr7" draw:text-style-name="P5" draw:layer="layout" svg:width="11.97cm" svg:height="0.897cm" svg:x="0.689cm" svg:y="13.416cm">
          <text:p text:style-name="P11"/>
          <draw:enhanced-geometry draw:mirror-horizontal="false" draw:mirror-vertical="false" draw:text-areas="?f5 ?f5 ?f6 ?f7" svg:viewBox="0 0 0 0" draw:type="ooxml-roundRect" draw:modifiers="82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9;p28" draw:style-name="gr2" draw:text-style-name="P3" draw:layer="layout" svg:width="2.214cm" svg:height="0.276cm" svg:x="0.879cm" svg:y="13.607cm">
          <text:p text:style-name="P2"><text:span text:style-name="T68">Regres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28" draw:style-name="gr2" draw:text-style-name="P3" draw:layer="layout" svg:width="11.589cm" svg:height="0.191cm" svg:x="0.879cm" svg:y="13.932cm">
          <text:p text:style-name="P11"><text:span text:style-name="T66">Estima nota em escala 0–10. Mais granular, útil para priorizar por severidade e identificar clientes no limi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28" draw:style-name="gr7" draw:text-style-name="P5" draw:layer="layout" svg:width="11.97cm" svg:height="0.897cm" svg:x="12.74cm" svg:y="13.416cm">
          <text:p text:style-name="P11"/>
          <draw:enhanced-geometry draw:mirror-horizontal="false" draw:mirror-vertical="false" draw:text-areas="?f5 ?f5 ?f6 ?f7" svg:viewBox="0 0 0 0" draw:type="ooxml-roundRect" draw:modifiers="82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2;p28" draw:style-name="gr2" draw:text-style-name="P3" draw:layer="layout" svg:width="2.214cm" svg:height="0.276cm" svg:x="12.93cm" svg:y="13.607cm">
          <text:p text:style-name="P2"><text:span text:style-name="T68">Classific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28" draw:style-name="gr2" draw:text-style-name="P3" draw:layer="layout" svg:width="11.59cm" svg:height="0.191cm" svg:x="12.93cm" svg:y="13.932cm">
          <text:p text:style-name="P11"><text:span text:style-name="T66">Categoriza em Detrator / Neutro / Promotor. Mais intuitivo para operações e alertas automátic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28" draw:style-name="gr44" draw:text-style-name="P47" draw:layer="layout" svg:width="24.021cm" svg:height="0.511cm" svg:x="0.689cm" svg:y="14.404cm">
          <text:p text:style-name="P11"/>
          <draw:enhanced-geometry draw:mirror-horizontal="false" draw:mirror-vertical="false" draw:text-areas="?f5 ?f5 ?f6 ?f7" svg:viewBox="0 0 0 0" draw:type="ooxml-roundRect" draw:modifiers="1454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395;p28" draw:style-name="gr1" draw:text-style-name="P1" draw:layer="layout" svg:width="0.22cm" svg:height="0.176cm" svg:x="0.866cm" svg:y="14.625cm">
          <draw:image xlink:href="Pictures/10000201000000220000001A38E6822737746204.png" xlink:type="simple" xlink:show="embed" xlink:actuate="onLoad">
            <text:p/>
          </draw:image>
        </draw:frame>
        <draw:custom-shape draw:name="Google Shape;396;p28" draw:style-name="gr2" draw:text-style-name="P3" draw:layer="layout" svg:width="23.268cm" svg:height="0.191cm" svg:x="1.265cm" svg:y="14.528cm">
          <text:p text:style-name="P11"><text:span text:style-name="T69">Recomendação: iniciar com </text:span><text:span text:style-name="T70">classificação binária</text:span><text:span text:style-name="T69"> (Risco de Detração / Sem Risco) pela simplicidade e aplicabilidade imedi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1;p9:notes" draw:style-name="gr6" draw:layer="layout" svg:width="15.239cm" svg:height="8.572cm" svg:x="1.905cm" svg:y="3.175cm" draw:page-number="15" presentation:class="page"/>
          <draw:frame draw:name="Google Shape;372;p9:notes" presentation:style-name="pr1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73;p9:notes" presentation:style-name="pr18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Host Grotesk" svg:font-family="'Host Grotesk'"/>
    <style:font-face style:name="Host Grotesk Medium" svg:font-family="'Host Grotesk Medium'"/>
    <style:font-face style:name="Roboto" svg:font-family="Roboto"/>
    <style:font-face style:name="Roboto Medium" svg:font-family="'Robot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1_20_master-background" style:display-name="Slide 1 master-background" style:family="presentation">
      <style:graphic-properties draw:stroke="none" draw:fill="solid" draw:fill-color="#000000"/>
      <style:text-properties style:letter-kerning="true"/>
    </style:style>
    <style:style style:name="Slide_20_1_20_master-backgroundobjects" style:display-name="Slide 1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1_20_master-notes" style:display-name="Slide 1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1_20_master-outline1" style:display-name="Slide 1 master-outline1" style:family="presentation">
      <style:graphic-properties draw:stroke="none" draw:fill="none" draw:auto-grow-height="false" draw:fit-to-size="shrink-to-fit" style:shrink-to-fit="true">
        <text:list-style style:name="Slide_20_1_20_master-outline1" style:display-name="Slide 1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1_20_master-outline2" style:display-name="Slide 1 master-outline2" style:family="presentation" style:parent-style-name="Slide_20_1_20_mast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1_20_master-outline3" style:display-name="Slide 1 master-outline3" style:family="presentation" style:parent-style-name="Slide_20_1_20_mast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1_20_master-outline4" style:display-name="Slide 1 master-outline4" style:family="presentation" style:parent-style-name="Slide_20_1_20_mast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1_20_master-outline5" style:display-name="Slide 1 master-outline5" style:family="presentation" style:parent-style-name="Slide_20_1_20_master-outline4">
      <style:paragraph-properties fo:margin-top="0.1cm" fo:margin-bottom="0cm"/>
      <style:text-properties fo:font-size="20pt" style:font-size-asian="20pt" style:font-size-complex="20pt"/>
    </style:style>
    <style:style style:name="Slide_20_1_20_master-outline6" style:display-name="Slide 1 master-outline6" style:family="presentation" style:parent-style-name="Slide_20_1_20_master-outline5">
      <style:paragraph-properties fo:margin-top="0.1cm" fo:margin-bottom="0cm"/>
      <style:text-properties fo:font-size="20pt" style:font-size-asian="20pt" style:font-size-complex="20pt"/>
    </style:style>
    <style:style style:name="Slide_20_1_20_master-outline7" style:display-name="Slide 1 master-outline7" style:family="presentation" style:parent-style-name="Slide_20_1_20_master-outline6">
      <style:paragraph-properties fo:margin-top="0.1cm" fo:margin-bottom="0cm"/>
      <style:text-properties fo:font-size="20pt" style:font-size-asian="20pt" style:font-size-complex="20pt"/>
    </style:style>
    <style:style style:name="Slide_20_1_20_master-outline8" style:display-name="Slide 1 master-outline8" style:family="presentation" style:parent-style-name="Slide_20_1_20_master-outline7">
      <style:paragraph-properties fo:margin-top="0.1cm" fo:margin-bottom="0cm"/>
      <style:text-properties fo:font-size="20pt" style:font-size-asian="20pt" style:font-size-complex="20pt"/>
    </style:style>
    <style:style style:name="Slide_20_1_20_master-outline9" style:display-name="Slide 1 master-outline9" style:family="presentation" style:parent-style-name="Slide_20_1_20_master-outline8">
      <style:paragraph-properties fo:margin-top="0.1cm" fo:margin-bottom="0cm"/>
      <style:text-properties fo:font-size="20pt" style:font-size-asian="20pt" style:font-size-complex="20pt"/>
    </style:style>
    <style:style style:name="Slide_20_1_20_master-subtitle" style:display-name="Slide 1 master-subtitle" style:family="presentation">
      <style:graphic-properties draw:stroke="none" draw:fill="none" draw:textarea-vertical-align="middle">
        <text:list-style style:name="Slide_20_1_20_master-subtitle" style:display-name="Slide 1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1_20_master-title" style:display-name="Slide 1 master-title" style:family="presentation">
      <style:graphic-properties draw:stroke="none" draw:fill="none" draw:textarea-vertical-align="middle">
        <text:list-style style:name="Slide_20_1_20_master-title" style:display-name="Slide 1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2_20_master-background" style:display-name="Slide 2 master-background" style:family="presentation">
      <style:graphic-properties draw:stroke="none" draw:fill="solid" draw:fill-color="#000000"/>
      <style:text-properties style:letter-kerning="true"/>
    </style:style>
    <style:style style:name="Slide_20_2_20_master-backgroundobjects" style:display-name="Slide 2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2_20_master-notes" style:display-name="Slide 2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2_20_master-outline1" style:display-name="Slide 2 master-outline1" style:family="presentation">
      <style:graphic-properties draw:stroke="none" draw:fill="none" draw:auto-grow-height="false" draw:fit-to-size="shrink-to-fit" style:shrink-to-fit="true">
        <text:list-style style:name="Slide_20_2_20_master-outline1" style:display-name="Slide 2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2_20_master-outline2" style:display-name="Slide 2 master-outline2" style:family="presentation" style:parent-style-name="Slide_20_2_20_mast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2_20_master-outline3" style:display-name="Slide 2 master-outline3" style:family="presentation" style:parent-style-name="Slide_20_2_20_mast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2_20_master-outline4" style:display-name="Slide 2 master-outline4" style:family="presentation" style:parent-style-name="Slide_20_2_20_mast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2_20_master-outline5" style:display-name="Slide 2 master-outline5" style:family="presentation" style:parent-style-name="Slide_20_2_20_master-outline4">
      <style:paragraph-properties fo:margin-top="0.1cm" fo:margin-bottom="0cm"/>
      <style:text-properties fo:font-size="20pt" style:font-size-asian="20pt" style:font-size-complex="20pt"/>
    </style:style>
    <style:style style:name="Slide_20_2_20_master-outline6" style:display-name="Slide 2 master-outline6" style:family="presentation" style:parent-style-name="Slide_20_2_20_master-outline5">
      <style:paragraph-properties fo:margin-top="0.1cm" fo:margin-bottom="0cm"/>
      <style:text-properties fo:font-size="20pt" style:font-size-asian="20pt" style:font-size-complex="20pt"/>
    </style:style>
    <style:style style:name="Slide_20_2_20_master-outline7" style:display-name="Slide 2 master-outline7" style:family="presentation" style:parent-style-name="Slide_20_2_20_master-outline6">
      <style:paragraph-properties fo:margin-top="0.1cm" fo:margin-bottom="0cm"/>
      <style:text-properties fo:font-size="20pt" style:font-size-asian="20pt" style:font-size-complex="20pt"/>
    </style:style>
    <style:style style:name="Slide_20_2_20_master-outline8" style:display-name="Slide 2 master-outline8" style:family="presentation" style:parent-style-name="Slide_20_2_20_master-outline7">
      <style:paragraph-properties fo:margin-top="0.1cm" fo:margin-bottom="0cm"/>
      <style:text-properties fo:font-size="20pt" style:font-size-asian="20pt" style:font-size-complex="20pt"/>
    </style:style>
    <style:style style:name="Slide_20_2_20_master-outline9" style:display-name="Slide 2 master-outline9" style:family="presentation" style:parent-style-name="Slide_20_2_20_master-outline8">
      <style:paragraph-properties fo:margin-top="0.1cm" fo:margin-bottom="0cm"/>
      <style:text-properties fo:font-size="20pt" style:font-size-asian="20pt" style:font-size-complex="20pt"/>
    </style:style>
    <style:style style:name="Slide_20_2_20_master-subtitle" style:display-name="Slide 2 master-subtitle" style:family="presentation">
      <style:graphic-properties draw:stroke="none" draw:fill="none" draw:textarea-vertical-align="middle">
        <text:list-style style:name="Slide_20_2_20_master-subtitle" style:display-name="Slide 2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2_20_master-title" style:display-name="Slide 2 master-title" style:family="presentation">
      <style:graphic-properties draw:stroke="none" draw:fill="none" draw:textarea-vertical-align="middle">
        <text:list-style style:name="Slide_20_2_20_master-title" style:display-name="Slide 2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3_20_master-background" style:display-name="Slide 3 master-background" style:family="presentation">
      <style:graphic-properties draw:stroke="none" draw:fill="solid" draw:fill-color="#000000"/>
      <style:text-properties style:letter-kerning="true"/>
    </style:style>
    <style:style style:name="Slide_20_3_20_master-backgroundobjects" style:display-name="Slide 3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3_20_master-notes" style:display-name="Slide 3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3_20_master-outline1" style:display-name="Slide 3 master-outline1" style:family="presentation">
      <style:graphic-properties draw:stroke="none" draw:fill="none" draw:auto-grow-height="false" draw:fit-to-size="shrink-to-fit" style:shrink-to-fit="true">
        <text:list-style style:name="Slide_20_3_20_master-outline1" style:display-name="Slide 3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3_20_master-outline2" style:display-name="Slide 3 master-outline2" style:family="presentation" style:parent-style-name="Slide_20_3_20_mast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3_20_master-outline3" style:display-name="Slide 3 master-outline3" style:family="presentation" style:parent-style-name="Slide_20_3_20_mast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3_20_master-outline4" style:display-name="Slide 3 master-outline4" style:family="presentation" style:parent-style-name="Slide_20_3_20_mast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3_20_master-outline5" style:display-name="Slide 3 master-outline5" style:family="presentation" style:parent-style-name="Slide_20_3_20_master-outline4">
      <style:paragraph-properties fo:margin-top="0.1cm" fo:margin-bottom="0cm"/>
      <style:text-properties fo:font-size="20pt" style:font-size-asian="20pt" style:font-size-complex="20pt"/>
    </style:style>
    <style:style style:name="Slide_20_3_20_master-outline6" style:display-name="Slide 3 master-outline6" style:family="presentation" style:parent-style-name="Slide_20_3_20_master-outline5">
      <style:paragraph-properties fo:margin-top="0.1cm" fo:margin-bottom="0cm"/>
      <style:text-properties fo:font-size="20pt" style:font-size-asian="20pt" style:font-size-complex="20pt"/>
    </style:style>
    <style:style style:name="Slide_20_3_20_master-outline7" style:display-name="Slide 3 master-outline7" style:family="presentation" style:parent-style-name="Slide_20_3_20_master-outline6">
      <style:paragraph-properties fo:margin-top="0.1cm" fo:margin-bottom="0cm"/>
      <style:text-properties fo:font-size="20pt" style:font-size-asian="20pt" style:font-size-complex="20pt"/>
    </style:style>
    <style:style style:name="Slide_20_3_20_master-outline8" style:display-name="Slide 3 master-outline8" style:family="presentation" style:parent-style-name="Slide_20_3_20_master-outline7">
      <style:paragraph-properties fo:margin-top="0.1cm" fo:margin-bottom="0cm"/>
      <style:text-properties fo:font-size="20pt" style:font-size-asian="20pt" style:font-size-complex="20pt"/>
    </style:style>
    <style:style style:name="Slide_20_3_20_master-outline9" style:display-name="Slide 3 master-outline9" style:family="presentation" style:parent-style-name="Slide_20_3_20_master-outline8">
      <style:paragraph-properties fo:margin-top="0.1cm" fo:margin-bottom="0cm"/>
      <style:text-properties fo:font-size="20pt" style:font-size-asian="20pt" style:font-size-complex="20pt"/>
    </style:style>
    <style:style style:name="Slide_20_3_20_master-subtitle" style:display-name="Slide 3 master-subtitle" style:family="presentation">
      <style:graphic-properties draw:stroke="none" draw:fill="none" draw:textarea-vertical-align="middle">
        <text:list-style style:name="Slide_20_3_20_master-subtitle" style:display-name="Slide 3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3_20_master-title" style:display-name="Slide 3 master-title" style:family="presentation">
      <style:graphic-properties draw:stroke="none" draw:fill="none" draw:textarea-vertical-align="middle">
        <text:list-style style:name="Slide_20_3_20_master-title" style:display-name="Slide 3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5_20_master-background" style:display-name="Slide 5 master-background" style:family="presentation">
      <style:graphic-properties draw:stroke="none" draw:fill="solid" draw:fill-color="#000000"/>
      <style:text-properties style:letter-kerning="true"/>
    </style:style>
    <style:style style:name="Slide_20_5_20_master-backgroundobjects" style:display-name="Slide 5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5_20_master-notes" style:display-name="Slide 5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5_20_master-outline1" style:display-name="Slide 5 master-outline1" style:family="presentation">
      <style:graphic-properties draw:stroke="none" draw:fill="none" draw:auto-grow-height="false" draw:fit-to-size="shrink-to-fit" style:shrink-to-fit="true">
        <text:list-style style:name="Slide_20_5_20_master-outline1" style:display-name="Slide 5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5_20_master-outline2" style:display-name="Slide 5 master-outline2" style:family="presentation" style:parent-style-name="Slide_20_5_20_mast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5_20_master-outline3" style:display-name="Slide 5 master-outline3" style:family="presentation" style:parent-style-name="Slide_20_5_20_mast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5_20_master-outline4" style:display-name="Slide 5 master-outline4" style:family="presentation" style:parent-style-name="Slide_20_5_20_mast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5_20_master-outline5" style:display-name="Slide 5 master-outline5" style:family="presentation" style:parent-style-name="Slide_20_5_20_master-outline4">
      <style:paragraph-properties fo:margin-top="0.1cm" fo:margin-bottom="0cm"/>
      <style:text-properties fo:font-size="20pt" style:font-size-asian="20pt" style:font-size-complex="20pt"/>
    </style:style>
    <style:style style:name="Slide_20_5_20_master-outline6" style:display-name="Slide 5 master-outline6" style:family="presentation" style:parent-style-name="Slide_20_5_20_master-outline5">
      <style:paragraph-properties fo:margin-top="0.1cm" fo:margin-bottom="0cm"/>
      <style:text-properties fo:font-size="20pt" style:font-size-asian="20pt" style:font-size-complex="20pt"/>
    </style:style>
    <style:style style:name="Slide_20_5_20_master-outline7" style:display-name="Slide 5 master-outline7" style:family="presentation" style:parent-style-name="Slide_20_5_20_master-outline6">
      <style:paragraph-properties fo:margin-top="0.1cm" fo:margin-bottom="0cm"/>
      <style:text-properties fo:font-size="20pt" style:font-size-asian="20pt" style:font-size-complex="20pt"/>
    </style:style>
    <style:style style:name="Slide_20_5_20_master-outline8" style:display-name="Slide 5 master-outline8" style:family="presentation" style:parent-style-name="Slide_20_5_20_master-outline7">
      <style:paragraph-properties fo:margin-top="0.1cm" fo:margin-bottom="0cm"/>
      <style:text-properties fo:font-size="20pt" style:font-size-asian="20pt" style:font-size-complex="20pt"/>
    </style:style>
    <style:style style:name="Slide_20_5_20_master-outline9" style:display-name="Slide 5 master-outline9" style:family="presentation" style:parent-style-name="Slide_20_5_20_master-outline8">
      <style:paragraph-properties fo:margin-top="0.1cm" fo:margin-bottom="0cm"/>
      <style:text-properties fo:font-size="20pt" style:font-size-asian="20pt" style:font-size-complex="20pt"/>
    </style:style>
    <style:style style:name="Slide_20_5_20_master-subtitle" style:display-name="Slide 5 master-subtitle" style:family="presentation">
      <style:graphic-properties draw:stroke="none" draw:fill="none" draw:textarea-vertical-align="middle">
        <text:list-style style:name="Slide_20_5_20_master-subtitle" style:display-name="Slide 5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5_20_master-title" style:display-name="Slide 5 master-title" style:family="presentation">
      <style:graphic-properties draw:stroke="none" draw:fill="none" draw:textarea-vertical-align="middle">
        <text:list-style style:name="Slide_20_5_20_master-title" style:display-name="Slide 5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10_20_master-background" style:display-name="Slide 10 master-background" style:family="presentation">
      <style:graphic-properties draw:stroke="none" draw:fill="solid" draw:fill-color="#000000"/>
      <style:text-properties style:letter-kerning="true"/>
    </style:style>
    <style:style style:name="Slide_20_10_20_master-backgroundobjects" style:display-name="Slide 10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10_20_master-notes" style:display-name="Slide 10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10_20_master-outline1" style:display-name="Slide 10 master-outline1" style:family="presentation">
      <style:graphic-properties draw:stroke="none" draw:fill="none" draw:auto-grow-height="false" draw:fit-to-size="shrink-to-fit" style:shrink-to-fit="true">
        <text:list-style style:name="Slide_20_10_20_master-outline1" style:display-name="Slide 10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10_20_master-outline2" style:display-name="Slide 10 master-outline2" style:family="presentation" style:parent-style-name="Slide_20_10_20_mast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10_20_master-outline3" style:display-name="Slide 10 master-outline3" style:family="presentation" style:parent-style-name="Slide_20_10_20_mast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10_20_master-outline4" style:display-name="Slide 10 master-outline4" style:family="presentation" style:parent-style-name="Slide_20_10_20_mast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10_20_master-outline5" style:display-name="Slide 10 master-outline5" style:family="presentation" style:parent-style-name="Slide_20_10_20_master-outline4">
      <style:paragraph-properties fo:margin-top="0.1cm" fo:margin-bottom="0cm"/>
      <style:text-properties fo:font-size="20pt" style:font-size-asian="20pt" style:font-size-complex="20pt"/>
    </style:style>
    <style:style style:name="Slide_20_10_20_master-outline6" style:display-name="Slide 10 master-outline6" style:family="presentation" style:parent-style-name="Slide_20_10_20_master-outline5">
      <style:paragraph-properties fo:margin-top="0.1cm" fo:margin-bottom="0cm"/>
      <style:text-properties fo:font-size="20pt" style:font-size-asian="20pt" style:font-size-complex="20pt"/>
    </style:style>
    <style:style style:name="Slide_20_10_20_master-outline7" style:display-name="Slide 10 master-outline7" style:family="presentation" style:parent-style-name="Slide_20_10_20_master-outline6">
      <style:paragraph-properties fo:margin-top="0.1cm" fo:margin-bottom="0cm"/>
      <style:text-properties fo:font-size="20pt" style:font-size-asian="20pt" style:font-size-complex="20pt"/>
    </style:style>
    <style:style style:name="Slide_20_10_20_master-outline8" style:display-name="Slide 10 master-outline8" style:family="presentation" style:parent-style-name="Slide_20_10_20_master-outline7">
      <style:paragraph-properties fo:margin-top="0.1cm" fo:margin-bottom="0cm"/>
      <style:text-properties fo:font-size="20pt" style:font-size-asian="20pt" style:font-size-complex="20pt"/>
    </style:style>
    <style:style style:name="Slide_20_10_20_master-outline9" style:display-name="Slide 10 master-outline9" style:family="presentation" style:parent-style-name="Slide_20_10_20_master-outline8">
      <style:paragraph-properties fo:margin-top="0.1cm" fo:margin-bottom="0cm"/>
      <style:text-properties fo:font-size="20pt" style:font-size-asian="20pt" style:font-size-complex="20pt"/>
    </style:style>
    <style:style style:name="Slide_20_10_20_master-subtitle" style:display-name="Slide 10 master-subtitle" style:family="presentation">
      <style:graphic-properties draw:stroke="none" draw:fill="none" draw:textarea-vertical-align="middle">
        <text:list-style style:name="Slide_20_10_20_master-subtitle" style:display-name="Slide 10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10_20_master-title" style:display-name="Slide 10 master-title" style:family="presentation">
      <style:graphic-properties draw:stroke="none" draw:fill="none" draw:textarea-vertical-align="middle">
        <text:list-style style:name="Slide_20_10_20_master-title" style:display-name="Slide 10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9_20_master-background" style:display-name="Slide 9 master-background" style:family="presentation">
      <style:graphic-properties draw:stroke="none" draw:fill="solid" draw:fill-color="#000000"/>
      <style:text-properties style:letter-kerning="true"/>
    </style:style>
    <style:style style:name="Slide_20_9_20_master-backgroundobjects" style:display-name="Slide 9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9_20_master-notes" style:display-name="Slide 9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9_20_master-outline1" style:display-name="Slide 9 master-outline1" style:family="presentation">
      <style:graphic-properties draw:stroke="none" draw:fill="none" draw:auto-grow-height="false" draw:fit-to-size="shrink-to-fit" style:shrink-to-fit="true">
        <text:list-style style:name="Slide_20_9_20_master-outline1" style:display-name="Slide 9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9_20_master-outline2" style:display-name="Slide 9 master-outline2" style:family="presentation" style:parent-style-name="Slide_20_9_20_mast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9_20_master-outline3" style:display-name="Slide 9 master-outline3" style:family="presentation" style:parent-style-name="Slide_20_9_20_mast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9_20_master-outline4" style:display-name="Slide 9 master-outline4" style:family="presentation" style:parent-style-name="Slide_20_9_20_mast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9_20_master-outline5" style:display-name="Slide 9 master-outline5" style:family="presentation" style:parent-style-name="Slide_20_9_20_master-outline4">
      <style:paragraph-properties fo:margin-top="0.1cm" fo:margin-bottom="0cm"/>
      <style:text-properties fo:font-size="20pt" style:font-size-asian="20pt" style:font-size-complex="20pt"/>
    </style:style>
    <style:style style:name="Slide_20_9_20_master-outline6" style:display-name="Slide 9 master-outline6" style:family="presentation" style:parent-style-name="Slide_20_9_20_master-outline5">
      <style:paragraph-properties fo:margin-top="0.1cm" fo:margin-bottom="0cm"/>
      <style:text-properties fo:font-size="20pt" style:font-size-asian="20pt" style:font-size-complex="20pt"/>
    </style:style>
    <style:style style:name="Slide_20_9_20_master-outline7" style:display-name="Slide 9 master-outline7" style:family="presentation" style:parent-style-name="Slide_20_9_20_master-outline6">
      <style:paragraph-properties fo:margin-top="0.1cm" fo:margin-bottom="0cm"/>
      <style:text-properties fo:font-size="20pt" style:font-size-asian="20pt" style:font-size-complex="20pt"/>
    </style:style>
    <style:style style:name="Slide_20_9_20_master-outline8" style:display-name="Slide 9 master-outline8" style:family="presentation" style:parent-style-name="Slide_20_9_20_master-outline7">
      <style:paragraph-properties fo:margin-top="0.1cm" fo:margin-bottom="0cm"/>
      <style:text-properties fo:font-size="20pt" style:font-size-asian="20pt" style:font-size-complex="20pt"/>
    </style:style>
    <style:style style:name="Slide_20_9_20_master-outline9" style:display-name="Slide 9 master-outline9" style:family="presentation" style:parent-style-name="Slide_20_9_20_master-outline8">
      <style:paragraph-properties fo:margin-top="0.1cm" fo:margin-bottom="0cm"/>
      <style:text-properties fo:font-size="20pt" style:font-size-asian="20pt" style:font-size-complex="20pt"/>
    </style:style>
    <style:style style:name="Slide_20_9_20_master-subtitle" style:display-name="Slide 9 master-subtitle" style:family="presentation">
      <style:graphic-properties draw:stroke="none" draw:fill="none" draw:textarea-vertical-align="middle">
        <text:list-style style:name="Slide_20_9_20_master-subtitle" style:display-name="Slide 9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9_20_master-title" style:display-name="Slide 9 master-title" style:family="presentation">
      <style:graphic-properties draw:stroke="none" draw:fill="none" draw:textarea-vertical-align="middle">
        <text:list-style style:name="Slide_20_9_20_master-title" style:display-name="Slide 9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c7e0e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af9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1_20_mast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Slide_20_1_20_mast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lide_20_2_20_master-backgroundobjects">
      <style:graphic-properties draw:stroke="none" draw:fill="none" draw:fill-color="#ffffff" draw:auto-grow-height="false" fo:min-height="1.27cm"/>
    </style:style>
    <style:style style:name="Mpr4" style:family="presentation" style:parent-style-name="Slide_20_2_20_master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Slide_20_3_20_mast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lide_20_3_20_mast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lide_20_5_20_mast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lide_20_5_20_mast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lide_20_10_20_master-backgroundobjects">
      <style:graphic-properties draw:stroke="none" draw:fill="none" draw:fill-color="#ffffff" draw:auto-grow-height="false" fo:min-height="1.27cm"/>
    </style:style>
    <style:style style:name="Mpr10" style:family="presentation" style:parent-style-name="Slide_20_10_20_master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lide_20_9_20_master-backgroundobjects">
      <style:graphic-properties draw:stroke="none" draw:fill="none" draw:fill-color="#ffffff" draw:auto-grow-height="false" fo:min-height="1.27cm"/>
    </style:style>
    <style:style style:name="Mpr14" style:family="presentation" style:parent-style-name="Slide_20_9_20_mast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7e0e7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af9f5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1_20_master" style:display-name="Slide 1 master" style:page-layout-name="PM1" draw:style-name="Mdp1">
      <draw:custom-shape draw:name="Google Shape;11;p2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2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draw:style-name="Mgr5" draw:text-style-name="MP7" draw:layer="backgroundobjects" svg:width="2.976cm" svg:height="0.71cm" svg:x="22.303cm" svg:y="13.457cm">
        <draw:image xlink:href="Pictures/1000020100000399000000DC05E867C0C1E7EDD3.png" xlink:type="simple" xlink:show="embed" xlink:actuate="onLoad">
          <text:p/>
        </draw:image>
      </draw:frame>
      <draw:frame presentation:style-name="Slide_20_1_20_master-title" draw:layer="backgroundobjects" svg:width="22.859cm" svg:height="2.385cm" svg:x="1.27cm" svg:y="0.57cm" presentation:class="title" presentation:placeholder="true">
        <draw:text-box/>
      </draw:frame>
      <draw:frame presentation:style-name="Slide_20_1_20_mast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1_20_master-title" draw:layer="backgroundobjects" svg:width="19.798cm" svg:height="11.136cm" svg:x="0.6cm" svg:y="2.257cm" presentation:class="page"/>
        <draw:frame presentation:style-name="Slide_20_1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2_20_master" style:display-name="Slide 2 master" style:page-layout-name="PM1" draw:style-name="Mdp1">
      <draw:custom-shape draw:name="Google Shape;15;p3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3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draw:style-name="Mgr5" draw:text-style-name="MP7" draw:layer="backgroundobjects" svg:width="2.976cm" svg:height="0.71cm" svg:x="22.303cm" svg:y="13.457cm">
        <draw:image xlink:href="Pictures/1000020100000399000000DC05E867C0C1E7EDD3.png" xlink:type="simple" xlink:show="embed" xlink:actuate="onLoad">
          <text:p/>
        </draw:image>
      </draw:frame>
      <draw:frame presentation:style-name="Slide_20_2_20_master-title" draw:layer="backgroundobjects" svg:width="22.859cm" svg:height="2.385cm" svg:x="1.27cm" svg:y="0.57cm" presentation:class="title" presentation:placeholder="true">
        <draw:text-box/>
      </draw:frame>
      <draw:frame presentation:style-name="Slide_20_2_20_mast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2_20_master-title" draw:layer="backgroundobjects" svg:width="14.287cm" svg:height="8.036cm" svg:x="0cm" svg:y="2.674cm" presentation:class="page"/>
        <draw:frame presentation:style-name="Slide_20_2_20_master-notes" draw:layer="backgroundobjects" svg:width="11.429cm" svg:height="11.429cm" svg:x="1.428cm" svg:y="12.065cm" presentation:class="notes" presentation:placeholder="true">
          <draw:text-box/>
        </draw:frame>
        <draw:frame presentation:style-name="Mpr3" draw:text-style-name="MP2" draw:layer="backgroundobjects" svg:width="6.199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6.199cm" svg:height="1.269cm" svg:x="8.088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6.199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6.199cm" svg:height="1.269cm" svg:x="8.088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3_20_master" style:display-name="Slide 3 master" style:page-layout-name="PM1" draw:style-name="Mdp1">
      <draw:custom-shape draw:name="Google Shape;19;p4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draw:style-name="Mgr5" draw:text-style-name="MP7" draw:layer="backgroundobjects" svg:width="2.976cm" svg:height="0.71cm" svg:x="22.303cm" svg:y="13.457cm">
        <draw:image xlink:href="Pictures/1000020100000399000000DC05E867C0C1E7EDD3.png" xlink:type="simple" xlink:show="embed" xlink:actuate="onLoad">
          <text:p/>
        </draw:image>
      </draw:frame>
      <draw:frame presentation:style-name="Slide_20_3_20_master-title" draw:layer="backgroundobjects" svg:width="22.859cm" svg:height="2.385cm" svg:x="1.27cm" svg:y="0.57cm" presentation:class="title" presentation:placeholder="true">
        <draw:text-box/>
      </draw:frame>
      <draw:frame presentation:style-name="Slide_20_3_20_mast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3_20_master-title" draw:layer="backgroundobjects" svg:width="14.287cm" svg:height="8.036cm" svg:x="0cm" svg:y="2.674cm" presentation:class="page"/>
        <draw:frame presentation:style-name="Slide_20_3_20_master-notes" draw:layer="backgroundobjects" svg:width="11.429cm" svg:height="11.429cm" svg:x="1.428cm" svg:y="12.065cm" presentation:class="notes" presentation:placeholder="true">
          <draw:text-box/>
        </draw:frame>
        <draw:frame presentation:style-name="Mpr5" draw:text-style-name="MP2" draw:layer="backgroundobjects" svg:width="6.199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6.199cm" svg:height="1.269cm" svg:x="8.088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6.199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6.199cm" svg:height="1.269cm" svg:x="8.088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5_20_master" style:display-name="Slide 5 master" style:page-layout-name="PM1" draw:style-name="Mdp1">
      <draw:custom-shape draw:name="Google Shape;27;p6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;p6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6" draw:style-name="Mgr5" draw:text-style-name="MP7" draw:layer="backgroundobjects" svg:width="2.976cm" svg:height="0.71cm" svg:x="22.303cm" svg:y="13.457cm">
        <draw:image xlink:href="Pictures/1000020100000399000000DC05E867C0C1E7EDD3.png" xlink:type="simple" xlink:show="embed" xlink:actuate="onLoad">
          <text:p/>
        </draw:image>
      </draw:frame>
      <draw:frame presentation:style-name="Slide_20_5_20_master-title" draw:layer="backgroundobjects" svg:width="22.859cm" svg:height="2.385cm" svg:x="1.27cm" svg:y="0.57cm" presentation:class="title" presentation:placeholder="true">
        <draw:text-box/>
      </draw:frame>
      <draw:frame presentation:style-name="Slide_20_5_20_mast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5_20_master-title" draw:layer="backgroundobjects" svg:width="14.287cm" svg:height="8.036cm" svg:x="0cm" svg:y="2.674cm" presentation:class="page"/>
        <draw:frame presentation:style-name="Slide_20_5_20_master-notes" draw:layer="backgroundobjects" svg:width="11.429cm" svg:height="11.429cm" svg:x="1.428cm" svg:y="12.065cm" presentation:class="notes" presentation:placeholder="true">
          <draw:text-box/>
        </draw:frame>
        <draw:frame presentation:style-name="Mpr7" draw:text-style-name="MP2" draw:layer="backgroundobjects" svg:width="6.199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6.199cm" svg:height="1.269cm" svg:x="8.088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6.199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6.199cm" svg:height="1.269cm" svg:x="8.088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10_20_master" style:display-name="Slide 10 master" style:page-layout-name="PM1" draw:style-name="Mdp1">
      <draw:custom-shape draw:name="Google Shape;47;p11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8;p11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9;p11" draw:style-name="Mgr5" draw:text-style-name="MP7" draw:layer="backgroundobjects" svg:width="2.976cm" svg:height="0.71cm" svg:x="22.303cm" svg:y="13.457cm">
        <draw:image xlink:href="Pictures/1000020100000399000000DC05E867C0C1E7EDD3.png" xlink:type="simple" xlink:show="embed" xlink:actuate="onLoad">
          <text:p/>
        </draw:image>
      </draw:frame>
      <draw:frame presentation:style-name="Slide_20_10_20_master-title" draw:layer="backgroundobjects" svg:width="22.859cm" svg:height="2.385cm" svg:x="1.27cm" svg:y="0.57cm" presentation:class="title" presentation:placeholder="true">
        <draw:text-box/>
      </draw:frame>
      <draw:frame presentation:style-name="Slide_20_10_20_mast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10_20_master-title" draw:layer="backgroundobjects" svg:width="14.287cm" svg:height="8.036cm" svg:x="0cm" svg:y="2.674cm" presentation:class="page"/>
        <draw:frame presentation:style-name="Slide_20_10_20_master-notes" draw:layer="backgroundobjects" svg:width="11.429cm" svg:height="11.429cm" svg:x="1.428cm" svg:y="12.065cm" presentation:class="notes" presentation:placeholder="true">
          <draw:text-box/>
        </draw:frame>
        <draw:frame presentation:style-name="Mpr9" draw:text-style-name="MP2" draw:layer="backgroundobjects" svg:width="6.199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6.199cm" svg:height="1.269cm" svg:x="8.088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6.199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6.199cm" svg:height="1.269cm" svg:x="8.088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87cm" svg:height="8.036cm" svg:x="0cm" svg:y="2.674cm" presentation:class="page"/>
        <draw:frame presentation:style-name="DEFAULT-notes" draw:layer="backgroundobjects" svg:width="11.429cm" svg:height="11.429cm" svg:x="1.428cm" svg:y="12.065cm" presentation:class="notes" presentation:placeholder="true">
          <draw:text-box/>
        </draw:frame>
        <draw:frame presentation:style-name="Mpr11" draw:text-style-name="MP2" draw:layer="backgroundobjects" svg:width="6.199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6.199cm" svg:height="1.269cm" svg:x="8.088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6.199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6.199cm" svg:height="1.269cm" svg:x="8.088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9_20_master" style:display-name="Slide 9 master" style:page-layout-name="PM1" draw:style-name="Mdp1">
      <draw:custom-shape draw:name="Google Shape;43;p10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10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5;p10" draw:style-name="Mgr5" draw:text-style-name="MP7" draw:layer="backgroundobjects" svg:width="2.976cm" svg:height="0.71cm" svg:x="22.303cm" svg:y="13.457cm">
        <draw:image xlink:href="Pictures/1000020100000399000000DC05E867C0C1E7EDD3.png" xlink:type="simple" xlink:show="embed" xlink:actuate="onLoad">
          <text:p/>
        </draw:image>
      </draw:frame>
      <presentation:notes style:page-layout-name="PM2">
        <draw:page-thumbnail presentation:style-name="Slide_20_9_20_master-title" draw:layer="backgroundobjects" svg:width="14.287cm" svg:height="8.036cm" svg:x="0cm" svg:y="2.674cm" presentation:class="page"/>
        <draw:frame presentation:style-name="Slide_20_9_20_master-notes" draw:layer="backgroundobjects" svg:width="11.429cm" svg:height="11.429cm" svg:x="1.428cm" svg:y="12.065cm" presentation:class="notes" presentation:placeholder="true">
          <draw:text-box/>
        </draw:frame>
        <draw:frame presentation:style-name="Mpr13" draw:text-style-name="MP2" draw:layer="backgroundobjects" svg:width="6.199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6.199cm" svg:height="1.269cm" svg:x="8.088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6.199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6.199cm" svg:height="1.269cm" svg:x="8.088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94"/>
    <meta:generator>LibreOfficeDev/6.0.5.2$Linux_X86_64 LibreOffice_project/</meta:generator>
  </office:meta>
</office:document-meta>
</file>